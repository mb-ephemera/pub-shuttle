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f5ce" draw:textarea-horizontal-align="justify" draw:textarea-vertical-align="middle" draw:auto-grow-height="false" fo:min-height="17.911cm" fo:min-width="35.441cm" fo:padding-top="0.252cm" fo:padding-bottom="0.252cm" fo:padding-left="0.377cm" fo:padding-right="0.3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13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20.682cm" loext:decorative="false"/>
      <style:paragraph-properties style:writing-mode="lr-tb"/>
    </style:style>
    <style:style style:name="gr4" style:family="graphic" style:parent-style-name="objectwithoutfill">
      <style:graphic-properties svg:stroke-width="0.212cm" svg:stroke-color="#355269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width="0.212cm" svg:stroke-color="#468a1a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textarea-horizontal-align="center" draw:textarea-vertical-align="middle" loext:decorative="false"/>
    </style:style>
    <style:style style:name="gr7" style:family="graphic" style:parent-style-name="objectwithoutfill">
      <style:graphic-properties svg:stroke-width="0.212cm" svg:stroke-color="#650953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8" style:family="graphic" style:parent-style-name="objectwithoutfill">
      <style:graphic-properties svg:stroke-width="0.212cm" svg:stroke-color="#bf819e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9" style:family="graphic" style:parent-style-name="objectwithoutfill">
      <style:graphic-properties svg:stroke-width="0.212cm" svg:stroke-color="#b7b3ca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10" style:family="graphic" style:parent-style-name="objectwithoutfill">
      <style:graphic-properties svg:stroke-width="0.212cm" svg:stroke-color="#729fcf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11" style:family="graphic" style:parent-style-name="objectwithoutfill">
      <style:graphic-properties svg:stroke-width="0.212cm" svg:stroke-color="#ffd428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12" style:family="graphic" style:parent-style-name="objectwithoutfill">
      <style:graphic-properties svg:stroke-width="0.212cm" svg:stroke-color="#ea7500" draw:marker-start-width="0.617cm" draw:marker-end-width="0.617cm" draw:fill="none" draw:textarea-horizontal-align="center" draw:textarea-vertical-align="middle" fo:padding-top="0.23cm" fo:padding-bottom="0.23cm" fo:padding-left="0.355cm" fo:padding-right="0.355cm" loext:decorative="false"/>
    </style:style>
    <style:style style:name="gr13" style:family="graphic" style:parent-style-name="objectwithoutfill">
      <style:graphic-properties svg:stroke-width="0.212cm" svg:stroke-color="#5eb91e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14" style:family="graphic" style:parent-style-name="objectwithoutfill">
      <style:graphic-properties svg:stroke-width="0.212cm" svg:stroke-color="#ea7500" draw:marker-start-width="0.618cm" draw:marker-end-width="0.618cm" draw:fill="none" draw:textarea-horizontal-align="center" draw:textarea-vertical-align="middle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02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8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3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42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3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6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375cm" loext:decorative="false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6.762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885cm" loext:decorative="false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5b277d" loext:opacity="100%" style:font-name="XB Zar" fo:font-size="26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color="#5b277d" loext:opacity="100%" style:font-name="XB Zar" fo:font-size="26pt" fo:font-weight="bold" style:font-size-asian="18pt" style:font-size-complex="18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2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632cm" svg:height="1.038cm" svg:x="10.35cm" svg:y="3.64cm">
          <draw:text-box>
            <text:p><text:span text:style-name="T1">Blee-AI: org-mode Framework for AI-Assisted Development </text:span></text:p>
          </draw:text-box>
        </draw:frame>
        <draw:frame draw:style-name="gr3" draw:text-style-name="P3" draw:layer="layout" svg:width="24.531cm" svg:height="1.644cm" svg:x="8.768cm" svg:y="1cm">
          <draw:text-box>
            <text:p><text:span text:style-name="T2">Blee (ByStar Libre-Halaal Emacs Environment)</text:span></text:p>
          </draw:text-box>
        </draw:frame>
        <draw:line draw:style-name="gr4" draw:text-style-name="P4" draw:layer="layout" svg:x1="16.34cm" svg:y1="21.22cm" svg:x2="16.34cm" svg:y2="18.68cm">
          <text:p/>
        </draw:line>
        <draw:line draw:style-name="gr4" draw:text-style-name="P4" draw:layer="layout" svg:x1="16.34cm" svg:y1="18.78cm" svg:x2="23.86cm" svg:y2="18.78cm">
          <text:p/>
        </draw:line>
        <draw:line draw:style-name="gr4" draw:text-style-name="P4" draw:layer="layout" svg:x1="23.76cm" svg:y1="18.78cm" svg:x2="23.76cm" svg:y2="21.218cm">
          <text:p/>
        </draw:line>
        <draw:line draw:style-name="gr5" draw:text-style-name="P4" draw:layer="layout" svg:x1="14.97cm" svg:y1="21.218cm" svg:x2="14.935cm" svg:y2="17.078cm">
          <text:p/>
        </draw:line>
        <draw:line draw:style-name="gr6" draw:text-style-name="P5" draw:layer="layout" svg:x1="0.365cm" svg:y1="4.289cm" svg:x2="1.864cm" svg:y2="4.289cm">
          <text:p/>
        </draw:line>
        <draw:line draw:style-name="gr5" draw:text-style-name="P4" draw:layer="layout" svg:x1="25.13cm" svg:y1="21.167cm" svg:x2="25.13cm" svg:y2="17.078cm">
          <text:p/>
        </draw:line>
        <draw:line draw:style-name="gr7" draw:text-style-name="P4" draw:layer="layout" svg:x1="13.33cm" svg:y1="21.218cm" svg:x2="13.33cm" svg:y2="15.351cm">
          <text:p/>
        </draw:line>
        <draw:line draw:style-name="gr7" draw:text-style-name="P4" draw:layer="layout" svg:x1="26.77cm" svg:y1="21.22cm" svg:x2="26.77cm" svg:y2="15.37cm">
          <text:p/>
        </draw:line>
        <draw:line draw:style-name="gr8" draw:text-style-name="P4" draw:layer="layout" svg:x1="11.725cm" svg:y1="21.22cm" svg:x2="11.725cm" svg:y2="13.6cm">
          <text:p/>
        </draw:line>
        <draw:line draw:style-name="gr8" draw:text-style-name="P4" draw:layer="layout" svg:x1="28.375cm" svg:y1="21.22cm" svg:x2="28.375cm" svg:y2="13.6cm">
          <text:p/>
        </draw:line>
        <draw:line draw:style-name="gr9" draw:text-style-name="P4" draw:layer="layout" svg:x1="9.89cm" svg:y1="21.22cm" svg:x2="9.89cm" svg:y2="11.949cm">
          <text:p/>
        </draw:line>
        <draw:line draw:style-name="gr9" draw:text-style-name="P4" draw:layer="layout" svg:x1="30.08cm" svg:y1="21.22cm" svg:x2="30.08cm" svg:y2="11.93cm">
          <text:p/>
        </draw:line>
        <draw:line draw:style-name="gr10" draw:text-style-name="P4" draw:layer="layout" svg:x1="31.985cm" svg:y1="21.218cm" svg:x2="31.985cm" svg:y2="10.169cm">
          <text:p/>
        </draw:line>
        <draw:line draw:style-name="gr11" draw:text-style-name="P4" draw:layer="layout" svg:x1="33.585cm" svg:y1="21.218cm" svg:x2="33.585cm" svg:y2="8.518cm">
          <text:p/>
        </draw:line>
        <draw:line draw:style-name="gr12" draw:text-style-name="P4" draw:layer="layout" svg:x1="36.895cm" svg:y1="21.168cm" svg:x2="36.76cm" svg:y2="5.242cm">
          <text:p/>
        </draw:line>
        <draw:line draw:style-name="gr10" draw:text-style-name="P4" draw:layer="layout" svg:x1="8.585cm" svg:y1="21.167cm" svg:x2="8.585cm" svg:y2="10.169cm">
          <text:p/>
        </draw:line>
        <draw:line draw:style-name="gr11" draw:text-style-name="P4" draw:layer="layout" svg:x1="7.015cm" svg:y1="21.22cm" svg:x2="7.015cm" svg:y2="8.52cm">
          <text:p/>
        </draw:line>
        <draw:line draw:style-name="gr13" draw:text-style-name="P4" draw:layer="layout" svg:x1="5.445cm" svg:y1="21.22cm" svg:x2="5.445cm" svg:y2="6.915cm">
          <text:p/>
        </draw:line>
        <draw:line draw:style-name="gr14" draw:text-style-name="P4" draw:layer="layout" svg:x1="3.87cm" svg:y1="5.31cm" svg:x2="36.763cm" svg:y2="5.31cm">
          <text:p/>
        </draw:line>
        <draw:line draw:style-name="gr13" draw:text-style-name="P4" draw:layer="layout" svg:x1="5.445cm" svg:y1="6.98cm" svg:x2="35.29cm" svg:y2="6.98cm">
          <text:p/>
        </draw:line>
        <draw:line draw:style-name="gr11" draw:text-style-name="P4" draw:layer="layout" svg:x1="7.049cm" svg:y1="8.619cm" svg:x2="33.485cm" svg:y2="8.617cm">
          <text:p/>
        </draw:line>
        <draw:line draw:style-name="gr10" draw:text-style-name="P4" draw:layer="layout" svg:x1="8.569cm" svg:y1="10.225cm" svg:x2="31.962cm" svg:y2="10.225cm">
          <text:p/>
        </draw:line>
        <draw:line draw:style-name="gr9" draw:text-style-name="P4" draw:layer="layout" svg:x1="9.89cm" svg:y1="12.03cm" svg:x2="30.21cm" svg:y2="12.03cm">
          <text:p/>
        </draw:line>
        <draw:line draw:style-name="gr8" draw:text-style-name="P4" draw:layer="layout" svg:x1="11.795cm" svg:y1="13.7cm" svg:x2="28.305cm" svg:y2="13.7cm">
          <text:p/>
        </draw:line>
        <draw:line draw:style-name="gr7" draw:text-style-name="P4" draw:layer="layout" svg:x1="13.465cm" svg:y1="15.47cm" svg:x2="26.8cm" svg:y2="15.47cm">
          <text:p/>
        </draw:line>
        <draw:line draw:style-name="gr5" draw:text-style-name="P4" draw:layer="layout" svg:x1="14.945cm" svg:y1="17.14cm" svg:x2="25.156cm" svg:y2="17.14cm">
          <text:p/>
        </draw:line>
        <draw:line draw:style-name="gr14" draw:text-style-name="P4" draw:layer="layout" svg:x1="3.84cm" svg:y1="5.193cm" svg:x2="3.84cm" svg:y2="21.17cm">
          <text:p/>
        </draw:line>
        <draw:line draw:style-name="gr13" draw:text-style-name="P4" draw:layer="layout" svg:x1="35.29cm" svg:y1="21.168cm" svg:x2="35.29cm" svg:y2="6.893cm">
          <text:p/>
        </draw:line>
        <draw:frame draw:style-name="gr15" draw:text-style-name="P2" draw:layer="layout" svg:width="6.418cm" svg:height="1.038cm" svg:x="16.802cm" svg:y="17.488cm">
          <draw:text-box>
            <text:p><text:span text:style-name="T1">PyCS and <text:s/>BISOS</text:span></text:p>
          </draw:text-box>
        </draw:frame>
        <draw:frame draw:style-name="gr16" draw:text-style-name="P2" draw:layer="layout" svg:width="4.528cm" svg:height="1.038cm" svg:x="17.992cm" svg:y="15.837cm">
          <draw:text-box>
            <text:p><text:span text:style-name="T1">Blee-Boot</text:span></text:p>
          </draw:text-box>
        </draw:frame>
        <draw:frame draw:style-name="gr17" draw:text-style-name="P2" draw:layer="layout" svg:width="13.389cm" svg:height="1.038cm" svg:x="13.318cm" svg:y="14.032cm">
          <draw:text-box>
            <text:p><text:span text:style-name="T1">Comment Blocks &amp; Universal DBlocks</text:span></text:p>
          </draw:text-box>
        </draw:frame>
        <draw:frame draw:style-name="gr18" draw:text-style-name="P2" draw:layer="layout" svg:width="5.032cm" svg:height="1.038cm" svg:x="17.688cm" svg:y="8.952cm">
          <draw:text-box>
            <text:p><text:span text:style-name="T1">Blee Panels</text:span></text:p>
          </draw:text-box>
        </draw:frame>
        <draw:frame draw:style-name="gr19" draw:text-style-name="P2" draw:layer="layout" svg:width="20.929cm" svg:height="1.038cm" svg:x="9.99cm" svg:y="7.35cm">
          <draw:text-box>
            <text:p><text:span text:style-name="T1">Bash Execution Dblocks in Panels and COMEEGA Unit-Tests</text:span></text:p>
          </draw:text-box>
        </draw:frame>
        <draw:frame draw:style-name="gr20" draw:text-style-name="P2" draw:layer="layout" svg:width="6.431cm" svg:height="1.038cm" svg:x="17.494cm" svg:y="5.645cm">
          <draw:text-box>
            <text:p><text:span text:style-name="T1">Blee Yasnippets</text:span></text:p>
          </draw:text-box>
        </draw:frame>
        <draw:frame draw:style-name="gr21" draw:text-style-name="P2" draw:layer="layout" svg:width="20.118cm" svg:height="1.038cm" svg:x="10.108cm" svg:y="10.525cm">
          <draw:text-box>
            <text:p><text:span text:style-name="T1">COMEEGA: </text:span><text:span text:style-name="T3">Collaboratibe org-mode Enhanced Emacs Generalized Authorship</text:span></text:p>
          </draw:text-box>
        </draw:frame>
        <draw:frame draw:style-name="gr22" draw:text-style-name="P2" draw:layer="layout" svg:width="14.875cm" svg:height="1.038cm" svg:x="12.995cm" svg:y="12.33cm">
          <draw:text-box>
            <text:p><text:span text:style-name="T1">Blee Dblocks Framework and Repository</text:span></text:p>
          </draw:text-box>
        </draw:frame>
        <draw:custom-shape draw:style-name="gr23" draw:text-style-name="P6" draw:layer="layout" svg:width="7.262cm" svg:height="2.25cm" svg:x="16.412cm" svg:y="18.8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7.386cm" svg:height="1.27cm" svg:x="16.457cm" svg:y="19.458cm">
          <draw:text-box>
            <text:p><text:span text:style-name="T4">Emacs +Debian + Python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Mohsen Banan</meta:initial-creator>
    <meta:creation-date>2008-12-11T11:12:16</meta:creation-date>
    <dc:date>2026-06-15T13:55:50.200147526</dc:date>
    <meta:editing-cycles>69</meta:editing-cycles>
    <meta:editing-duration>PT10H25M36S</meta:editing-duration>
    <meta:print-date>2022-11-11T19:39:12.150258840</meta:print-date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