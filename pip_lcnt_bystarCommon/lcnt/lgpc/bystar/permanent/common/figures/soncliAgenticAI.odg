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5b277d" draw:marker-start-width="0.421cm" draw:marker-end-width="0.421cm" draw:fill-color="#ffffff" draw:textarea-horizontal-align="justify" draw:textarea-vertical-align="middle" draw:auto-grow-height="false" fo:min-height="2.355cm" fo:min-width="13.33cm" fo:padding-top="0.165cm" fo:padding-bottom="0.165cm" fo:padding-left="0.29cm" fo:padding-right="0.29cm"/>
    </style:style>
    <style:style style:name="gr2" style:family="graphic" style:parent-style-name="standard">
      <style:graphic-properties svg:stroke-color="#e20074" draw:fill-color="#e20074" draw:textarea-horizontal-align="justify" draw:textarea-vertical-align="middle" draw:auto-grow-height="false" fo:min-height="2.163cm" fo:min-width="6.739cm"/>
    </style:style>
    <style:style style:name="gr3" style:family="graphic" style:parent-style-name="standard">
      <style:graphic-properties svg:stroke-color="#3faf46" draw:fill-color="#3faf46" draw:textarea-horizontal-align="justify" draw:textarea-vertical-align="middle" draw:auto-grow-height="false" fo:min-height="1.931cm" fo:min-width="5.286cm"/>
    </style:style>
    <style:style style:name="gr4" style:family="graphic" style:parent-style-name="standard">
      <style:graphic-properties svg:stroke-color="#005aff" draw:fill-color="#005aff" draw:textarea-horizontal-align="justify" draw:textarea-vertical-align="middle" draw:auto-grow-height="false" fo:min-height="1.817cm" fo:min-width="3.945cm"/>
    </style:style>
    <style:style style:name="gr5" style:family="graphic" style:parent-style-name="objectwithoutfill">
      <style:graphic-properties draw:marker-end="Arrowheads_20_57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end="Arrowheads_20_58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marker-end="Arrowheads_20_59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marker-end="Arrowheads_20_60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draw:marker-end="Arrowheads_20_61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marker-end="Arrowheads_20_62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objectwithoutfill">
      <style:graphic-properties draw:marker-end="Arrowheads_20_63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svg:stroke-width="0.159cm" svg:stroke-color="#f10d0c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6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74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992cm"/>
      <style:paragraph-properties style:writing-mode="lr-tb"/>
    </style:style>
    <style:style style:name="gr17" style:family="graphic" style:parent-style-name="standard">
      <style:graphic-properties svg:stroke-width="0.081cm" svg:stroke-color="#3faf46" draw:marker-start-width="0.421cm" draw:marker-end-width="0.421cm" draw:fill-color="#b2b2b2" draw:textarea-horizontal-align="justify" draw:textarea-vertical-align="middle" draw:auto-grow-height="false" fo:min-height="1.147cm" fo:min-width="11.057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2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0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675cm"/>
      <style:paragraph-properties style:writing-mode="lr-tb"/>
    </style:style>
    <style:style style:name="gr23" style:family="graphic" style:parent-style-name="standard">
      <style:graphic-properties svg:stroke-color="#005aff" draw:fill-color="#005aff" draw:textarea-horizontal-align="justify" draw:textarea-vertical-align="middle" draw:auto-grow-height="false" fo:min-height="0.993cm" fo:min-width="2.435cm"/>
    </style:style>
    <style:style style:name="gr24" style:family="graphic" style:parent-style-name="standard">
      <style:graphic-properties draw:stroke="none" svg:stroke-color="#000000" draw:fill="none" draw:fill-color="#005aff" draw:textarea-horizontal-align="left" draw:auto-grow-height="true" draw:auto-grow-width="true" fo:min-height="1.423cm" fo:min-width="3.528cm"/>
      <style:paragraph-properties style:writing-mode="lr-tb"/>
    </style:style>
    <style:style style:name="gr25" style:family="graphic" style:parent-style-name="objectwithoutfill">
      <style:graphic-properties draw:marker-end="Arrowheads_20_64" draw:marker-end-width="0.3cm" draw:fill="none" draw:textarea-horizontal-align="center" draw:textarea-vertical-align="middle"/>
    </style:style>
    <style:style style:name="gr26" style:family="graphic" style:parent-style-name="objectwithoutfill">
      <style:graphic-properties draw:marker-end="Arrowheads_20_65" draw:marker-end-width="0.3cm" draw:fill="none" draw:textarea-horizontal-align="center" draw:textarea-vertical-align="middle"/>
    </style:style>
    <style:style style:name="gr27" style:family="graphic" style:parent-style-name="objectwithoutfill">
      <style:graphic-properties draw:marker-end="Arrowheads_20_66" draw:marker-end-width="0.3cm" draw:fill="none" draw:textarea-horizontal-align="center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e20074"/>
      <style:paragraph-properties fo:text-align="center"/>
    </style:style>
    <style:style style:name="P3" style:family="paragraph">
      <loext:graphic-properties draw:fill-color="#3faf46"/>
      <style:paragraph-properties fo:text-align="center"/>
    </style:style>
    <style:style style:name="P4" style:family="paragraph">
      <loext:graphic-properties draw:fill-color="#005a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fo:font-size="18pt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1" style:family="paragraph">
      <loext:graphic-properties draw:fill="none" draw:fill-color="#005aff"/>
      <style:paragraph-properties style:writing-mode="lr-tb"/>
      <style:text-properties fo:color="#ffffff" loext:opacity="100%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ffff" loext:opacity="100%" fo:font-size="18pt"/>
    </style:style>
    <style:style style:name="T3" style:family="text">
      <style:text-properties fo:font-size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ffff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9.558cm" svg:height="3.683cm" svg:x="11.117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239cm" svg:height="2.413cm" svg:x="3.98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86cm" svg:height="2.181cm" svg:x="18.807cm" svg:y="8.3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285cm" svg:height="2.921cm" svg:x="28.559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6.607cm" svg:y1="10.525cm" svg:x2="10.798cm" svg:y2="13.446cm">
          <text:p/>
        </draw:line>
        <draw:line draw:style-name="gr6" draw:text-style-name="P5" draw:layer="layout" svg:x1="13.573cm" svg:y1="15.351cm" svg:x2="9.89cm" svg:y2="12.811cm">
          <text:p/>
        </draw:line>
        <draw:line draw:style-name="gr7" draw:text-style-name="P5" draw:layer="layout" svg:x1="13.319cm" svg:y1="9.636cm" svg:x2="15.946cm" svg:y2="9.636cm">
          <text:p/>
        </draw:line>
        <draw:line draw:style-name="gr8" draw:text-style-name="P5" draw:layer="layout" svg:x1="24.622cm" svg:y1="9.763cm" svg:x2="27.924cm" svg:y2="9.763cm">
          <text:p/>
        </draw:line>
        <draw:line draw:style-name="gr9" draw:text-style-name="P5" draw:layer="layout" svg:x1="28.559cm" svg:y1="9.763cm" svg:x2="25.765cm" svg:y2="9.763cm">
          <text:p/>
        </draw:line>
        <draw:line draw:style-name="gr10" draw:text-style-name="P5" draw:layer="layout" svg:x1="20.137cm" svg:y1="10.525cm" svg:x2="21.066cm" svg:y2="12.176cm">
          <text:p/>
        </draw:line>
        <draw:line draw:style-name="gr11" draw:text-style-name="P5" draw:layer="layout" svg:x1="12.303cm" svg:y1="2.159cm" svg:x2="12.176cm" svg:y2="2.159cm">
          <text:p/>
        </draw:line>
        <draw:line draw:style-name="gr11" draw:text-style-name="P5" draw:layer="layout" svg:x1="20.899cm" svg:y1="11.922cm" svg:x2="22.296cm" svg:y2="14.716cm">
          <text:p/>
        </draw:line>
        <draw:line draw:style-name="gr12" draw:text-style-name="P5" draw:layer="layout" svg:x1="23.82cm" svg:y1="14.716cm" svg:x2="21.955cm" svg:y2="11.287cm">
          <text:p/>
        </draw:line>
        <draw:line draw:style-name="gr11" draw:text-style-name="P5" draw:layer="layout" svg:x1="22.931cm" svg:y1="13.065cm" svg:x2="21.534cm" svg:y2="10.525cm">
          <text:p/>
        </draw:line>
        <draw:line draw:style-name="gr13" draw:text-style-name="P5" draw:layer="layout" svg:x1="1cm" svg:y1="1.127cm" svg:x2="39.1cm" svg:y2="1cm">
          <text:p/>
        </draw:line>
        <draw:line draw:style-name="gr13" draw:text-style-name="P5" draw:layer="layout" svg:x1="38.973cm" svg:y1="1cm" svg:x2="39.1cm" svg:y2="21.32cm">
          <text:p/>
        </draw:line>
        <draw:line draw:style-name="gr13" draw:text-style-name="P5" draw:layer="layout" svg:x1="39.1cm" svg:y1="21.193cm" svg:x2="1cm" svg:y2="21.32cm">
          <text:p/>
        </draw:line>
        <draw:line draw:style-name="gr13" draw:text-style-name="P5" draw:layer="layout" svg:x1="1cm" svg:y1="1cm" svg:x2="1cm" svg:y2="21.447cm">
          <text:p/>
        </draw:line>
        <draw:frame draw:style-name="gr14" draw:text-style-name="P6" draw:layer="layout" svg:width="14.125cm" svg:height="1.673cm" svg:x="13.427cm" svg:y="1.951cm">
          <draw:text-box>
            <text:p><text:span text:style-name="T1">Agentic-AI <text:s/>Needs a CLI</text:span></text:p>
          </draw:text-box>
        </draw:frame>
        <draw:frame draw:style-name="gr15" draw:text-style-name="P6" draw:layer="layout" svg:width="22.244cm" svg:height="1.673cm" svg:x="9.22cm" svg:y="3.456cm">
          <draw:text-box>
            <text:p><text:span text:style-name="T1">soncli.mcs <text:s/>as an Agentic-AI Facilitator</text:span></text:p>
          </draw:text-box>
        </draw:frame>
        <draw:frame draw:style-name="gr16" draw:text-style-name="P7" draw:layer="layout" svg:width="6.492cm" svg:height="2.384cm" svg:x="4.373cm" svg:y="8.141cm">
          <draw:text-box>
            <text:p><text:span text:style-name="T2">Under Development</text:span></text:p>
            <text:p><text:span text:style-name="T2">Custom SON Module</text:span></text:p>
            <text:p><text:span text:style-name="T2">(Using Nokia SDK)</text:span></text:p>
          </draw:text-box>
        </draw:frame>
        <draw:custom-shape draw:style-name="gr17" draw:text-style-name="P8" draw:layer="layout" svg:width="11.557cm" svg:height="1.397cm" svg:x="16.113cm" svg:y="12.43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9.028cm" svg:height="0.962cm" svg:x="17.245cm" svg:y="12.684cm">
          <draw:text-box>
            <text:p><text:span text:style-name="T3">Command Line Interface (CLI)</text:span></text:p>
          </draw:text-box>
        </draw:frame>
        <draw:frame draw:style-name="gr19" draw:text-style-name="P9" draw:layer="layout" svg:width="3.461cm" svg:height="0.962cm" svg:x="20.034cm" svg:y="8.955cm">
          <draw:text-box>
            <text:p><text:span text:style-name="T3">soncli.mcs</text:span></text:p>
          </draw:text-box>
        </draw:frame>
        <draw:frame draw:style-name="gr20" draw:text-style-name="P9" draw:layer="layout" svg:width="5.675cm" svg:height="1.673cm" svg:x="29.107cm" svg:y="8.752cm">
          <draw:text-box>
            <text:p><text:span text:style-name="T2">Nokia SON</text:span></text:p>
            <text:p><text:span text:style-name="T2">Distributed Engine</text:span></text:p>
          </draw:text-box>
        </draw:frame>
        <draw:frame draw:style-name="gr21" draw:text-style-name="P10" draw:layer="layout" svg:width="4.405cm" svg:height="1.195cm" svg:x="18.436cm" svg:y="15.07cm">
          <draw:text-box>
            <text:p><text:span text:style-name="T4">Agentic-AI</text:span></text:p>
          </draw:text-box>
        </draw:frame>
        <draw:frame draw:style-name="gr22" draw:text-style-name="P9" draw:layer="layout" svg:width="15.175cm" svg:height="0.962cm" svg:x="13.443cm" svg:y="16.375cm">
          <draw:text-box>
            <text:p><text:span text:style-name="T3">Copilot, Claude, GPT <text:s/>-- Through cli, with soncli.mcs</text:span></text:p>
          </draw:text-box>
        </draw:frame>
        <draw:custom-shape draw:style-name="gr23" draw:text-style-name="P4" draw:layer="layout" svg:width="4.445cm" svg:height="1.883cm" svg:x="12.519cm" svg:y="8.488cm">
          <text:p/>
          <draw:enhanced-geometry svg:viewBox="0 0 21600 21600" draw:glue-points="?f6 10800 10800 21600 ?f5 10800 10800 0" draw:text-areas="?f3 ?f3 ?f4 ?f4" draw:type="trapezoid" draw:modifiers="3460.8011113683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1" draw:layer="layout" svg:width="4.028cm" svg:height="1.673cm" svg:x="12.709cm" svg:y="8.644cm">
          <draw:text-box>
            <text:p><text:span text:style-name="T5">SON Python</text:span></text:p>
            <text:p><text:span text:style-name="T5"><text:s text:c="5"/></text:span><text:span text:style-name="T5">API</text:span></text:p>
          </draw:text-box>
        </draw:frame>
        <draw:line draw:style-name="gr25" draw:text-style-name="P5" draw:layer="layout" svg:x1="14.589cm" svg:y1="10.398cm" svg:x2="14.716cm" svg:y2="13.065cm">
          <text:p/>
        </draw:line>
        <draw:line draw:style-name="gr26" draw:text-style-name="P5" draw:layer="layout" svg:x1="16.367cm" svg:y1="9.763cm" svg:x2="17.891cm" svg:y2="9.782cm">
          <text:p/>
        </draw:line>
        <draw:line draw:style-name="gr11" draw:text-style-name="P5" draw:layer="layout" svg:x1="17.129cm" svg:y1="9.763cm" svg:x2="18.78cm" svg:y2="9.782cm">
          <text:p/>
        </draw:line>
        <draw:line draw:style-name="gr11" draw:text-style-name="P5" draw:layer="layout" svg:x1="14.716cm" svg:y1="12.811cm" svg:x2="14.843cm" svg:y2="15.097cm">
          <text:p/>
        </draw:line>
        <draw:line draw:style-name="gr27" draw:text-style-name="P5" draw:layer="layout" svg:x1="11.16cm" svg:y1="9.782cm" svg:x2="12.176cm" svg:y2="9.782cm">
          <text:p/>
        </draw:line>
        <draw:line draw:style-name="gr11" draw:text-style-name="P5" draw:layer="layout" svg:x1="11.795cm" svg:y1="9.782cm" svg:x2="13.065cm" svg:y2="9.76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Mohsen Banan</meta:initial-creator>
    <meta:creation-date>2008-06-01T19:57:48</meta:creation-date>
    <dc:date>2026-03-07T13:01:08.530656392</dc:date>
    <meta:editing-cycles>75</meta:editing-cycles>
    <meta:editing-duration>PT9H9M29S</meta:editing-duration>
    <meta:print-date>2017-04-17T17:26:32.987291272</meta:print-date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