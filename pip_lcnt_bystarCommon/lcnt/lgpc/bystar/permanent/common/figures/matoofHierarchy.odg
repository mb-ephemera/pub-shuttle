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0.919cm" fo:min-width="3.003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0.919cm" fo:min-width="3.003cm"/>
    </style:style>
    <style:style style:name="gr3" style:family="graphic" style:parent-style-name="standard">
      <style:graphic-properties svg:stroke-width="0.035cm" draw:marker-start-width="0.352cm" draw:marker-end-width="0.352cm" draw:fill-color="#ff860d" draw:textarea-horizontal-align="justify" draw:textarea-vertical-align="middle" draw:auto-grow-height="false" fo:min-height="0.919cm" fo:min-width="3.003cm" fo:padding-top="0.142cm" fo:padding-bottom="0.142cm" fo:padding-left="0.267cm" fo:padding-right="0.26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919cm" fo:min-width="3.003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0.919cm" fo:min-width="3.003cm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0.919cm" fo:min-width="3.003cm"/>
    </style:style>
    <style:style style:name="gr7" style:family="graphic" style:parent-style-name="objectwithoutfill">
      <style:graphic-properties svg:stroke-width="0.159cm" svg:stroke-color="#c9211e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draw:marker-end="Arrowheads_20_45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heads_20_46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heads_20_47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Arrowheads_20_48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heads_20_49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Arrowheads_20_50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heads_20_51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heads_20_52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marker-end="Arrowheads_20_53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heads_20_54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9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0.8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12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.64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.352cm"/>
      <style:paragraph-properties style:writing-mode="lr-tb"/>
    </style:style>
    <style:style style:name="gr34" style:family="graphic" style:parent-style-name="standard">
      <style:graphic-properties draw:fill-color="#b7b3ca" draw:textarea-horizontal-align="justify" draw:textarea-vertical-align="middle" draw:auto-grow-height="false" fo:min-height="6.435cm" fo:min-width="3.159cm"/>
    </style:style>
    <style:style style:name="gr35" style:family="graphic" style:parent-style-name="standard">
      <style:graphic-properties draw:fill-color="#ffa6a6" draw:textarea-horizontal-align="justify" draw:textarea-vertical-align="middle" draw:auto-grow-height="false" fo:min-height="1.274cm" fo:min-width="6.993cm"/>
    </style:style>
    <style:style style:name="gr36" style:family="graphic" style:parent-style-name="standard">
      <style:graphic-properties draw:fill-color="#ffd428" draw:textarea-horizontal-align="justify" draw:textarea-vertical-align="middle" draw:auto-grow-height="false" fo:min-height="3.814cm" fo:min-width="3.1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6.088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ff860d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bbe33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54pt" style:font-size-asian="48pt" style:font-size-complex="48pt"/>
    </style:style>
    <style:style style:name="P10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11" style:family="paragraph">
      <loext:graphic-properties draw:fill-color="#b7b3ca"/>
      <style:paragraph-properties fo:text-align="center"/>
    </style:style>
    <style:style style:name="P12" style:family="paragraph">
      <loext:graphic-properties draw:fill-color="#ffa6a6"/>
      <style:paragraph-properties fo:text-align="center"/>
    </style:style>
    <style:style style:name="P13" style:family="paragraph">
      <loext:graphic-properties draw:fill-color="#ffd42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text-properties fo:color="#168253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168253" loext:opacity="100%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style:font-size-asian="48pt" style:font-size-complex="48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953cm" svg:height="1.651cm" svg:x="12.46cm" svg:y="9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1.651cm" svg:x="20.461cm" svg:y="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1.651cm" svg:x="28.208cm" svg:y="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53cm" svg:height="1.651cm" svg:x="15.88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953cm" svg:height="1.651cm" svg:x="15cm" svg:y="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953cm" svg:height="1.651cm" svg:x="24.525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53cm" svg:height="1.651cm" svg:x="25.384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53cm" svg:height="1.651cm" svg:x="14.195cm" svg:y="1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53cm" svg:height="1.651cm" svg:x="20.172cm" svg:y="1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953cm" svg:height="1.651cm" svg:x="12.333cm" svg:y="19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953cm" svg:height="1.651cm" svg:x="18.81cm" svg:y="1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7cm" svg:y1="1cm" svg:x2="36.56cm" svg:y2="1cm">
          <text:p/>
        </draw:line>
        <draw:line draw:style-name="gr8" draw:text-style-name="P6" draw:layer="layout" svg:x1="36.56cm" svg:y1="1cm" svg:x2="36.56cm" svg:y2="21.86cm">
          <text:p/>
        </draw:line>
        <draw:line draw:style-name="gr8" draw:text-style-name="P6" draw:layer="layout" svg:x1="2.24cm" svg:y1="1cm" svg:x2="2.24cm" svg:y2="21.86cm">
          <text:p/>
        </draw:line>
        <draw:line draw:style-name="gr8" draw:text-style-name="P6" draw:layer="layout" svg:x1="2.27cm" svg:y1="21.86cm" svg:x2="36.56cm" svg:y2="21.86cm">
          <text:p/>
        </draw:line>
        <draw:line draw:style-name="gr9" draw:text-style-name="P6" draw:layer="layout" svg:x1="16.651cm" svg:y1="8.731cm" svg:x2="16.113cm" svg:y2="9.874cm">
          <text:p/>
        </draw:line>
        <draw:line draw:style-name="gr10" draw:text-style-name="P6" draw:layer="layout" svg:x1="18.048cm" svg:y1="8.731cm" svg:x2="20.812cm" svg:y2="10.382cm">
          <text:p/>
        </draw:line>
        <draw:line draw:style-name="gr11" draw:text-style-name="P6" draw:layer="layout" svg:x1="26.43cm" svg:y1="8.858cm" svg:x2="24.749cm" svg:y2="10.255cm">
          <text:p/>
        </draw:line>
        <draw:line draw:style-name="gr12" draw:text-style-name="P6" draw:layer="layout" svg:x1="27.573cm" svg:y1="8.858cm" svg:x2="29.194cm" svg:y2="10.001cm">
          <text:p/>
        </draw:line>
        <draw:line draw:style-name="gr13" draw:text-style-name="P6" draw:layer="layout" svg:x1="22.59cm" svg:y1="11.525cm" svg:x2="20.558cm" svg:y2="13.811cm">
          <text:p/>
        </draw:line>
        <draw:line draw:style-name="gr14" draw:text-style-name="P6" draw:layer="layout" svg:x1="22.463cm" svg:y1="11.525cm" svg:x2="25.892cm" svg:y2="13.684cm">
          <text:p/>
        </draw:line>
        <draw:line draw:style-name="gr15" draw:text-style-name="P6" draw:layer="layout" svg:x1="18.399cm" svg:y1="15.005cm" svg:x2="17.764cm" svg:y2="16.275cm">
          <text:p/>
        </draw:line>
        <draw:line draw:style-name="gr16" draw:text-style-name="P6" draw:layer="layout" svg:x1="18.399cm" svg:y1="15.005cm" svg:x2="20.812cm" svg:y2="16.402cm">
          <text:p/>
        </draw:line>
        <draw:line draw:style-name="gr17" draw:text-style-name="P6" draw:layer="layout" svg:x1="16.748cm" svg:y1="17.799cm" svg:x2="15.859cm" svg:y2="18.815cm">
          <text:p/>
        </draw:line>
        <draw:line draw:style-name="gr18" draw:text-style-name="P6" draw:layer="layout" svg:x1="16.875cm" svg:y1="17.799cm" svg:x2="19.542cm" svg:y2="19.069cm">
          <text:p/>
        </draw:line>
        <draw:frame draw:style-name="gr19" draw:text-style-name="P7" draw:layer="layout" svg:width="29.75cm" svg:height="1.432cm" svg:x="6.224cm" svg:y="2.989cm">
          <draw:text-box>
            <text:p><text:span text:style-name="T1">Clusters, Destinations, Targets, Managed Objects, Parameters</text:span></text:p>
          </draw:text-box>
        </draw:frame>
        <draw:frame draw:style-name="gr20" draw:text-style-name="P7" draw:layer="layout" svg:width="11.322cm" svg:height="1.432cm" svg:x="15.024cm" svg:y="4.386cm">
          <draw:text-box>
            <text:p><text:span text:style-name="T1">Containment Hierarchy</text:span></text:p>
          </draw:text-box>
        </draw:frame>
        <draw:frame draw:style-name="gr21" draw:text-style-name="P8" draw:layer="layout" svg:width="3.072cm" svg:height="0.962cm" svg:x="15.962cm" svg:y="7.491cm">
          <draw:text-box>
            <text:p><text:span text:style-name="T2">Cluster-1</text:span></text:p>
          </draw:text-box>
        </draw:frame>
        <draw:frame draw:style-name="gr22" draw:text-style-name="P8" draw:layer="layout" svg:width="3.177cm" svg:height="0.962cm" svg:x="25.514cm" svg:y="7.591cm">
          <draw:text-box>
            <text:p><text:span text:style-name="T2">Cluster-N</text:span></text:p>
          </draw:text-box>
        </draw:frame>
        <draw:frame draw:style-name="gr23" draw:text-style-name="P8" draw:layer="layout" svg:width="2.826cm" svg:height="0.962cm" svg:x="16.946cm" svg:y="13.773cm">
          <draw:text-box>
            <text:p><text:span text:style-name="T2">Target-1</text:span></text:p>
          </draw:text-box>
        </draw:frame>
        <draw:frame draw:style-name="gr24" draw:text-style-name="P8" draw:layer="layout" svg:width="4.232cm" svg:height="0.962cm" svg:x="12.773cm" svg:y="10.163cm">
          <draw:text-box>
            <text:p><text:span text:style-name="T2">Destination-1</text:span></text:p>
          </draw:text-box>
        </draw:frame>
        <draw:frame draw:style-name="gr25" draw:text-style-name="P8" draw:layer="layout" svg:width="4.409cm" svg:height="0.962cm" svg:x="20.715cm" svg:y="10.236cm">
          <draw:text-box>
            <text:p><text:span text:style-name="T2">Destination-M</text:span></text:p>
          </draw:text-box>
        </draw:frame>
        <draw:frame draw:style-name="gr26" draw:text-style-name="P8" draw:layer="layout" svg:width="4.337cm" svg:height="0.962cm" svg:x="28.548cm" svg:y="10.236cm">
          <draw:text-box>
            <text:p><text:span text:style-name="T2">Destination-N</text:span></text:p>
          </draw:text-box>
        </draw:frame>
        <draw:frame draw:style-name="gr27" draw:text-style-name="P8" draw:layer="layout" svg:width="2.932cm" svg:height="1.078cm" svg:x="26.395cm" svg:y="13.646cm">
          <draw:text-box>
            <text:p><text:span text:style-name="T2">Target-N</text:span></text:p>
          </draw:text-box>
        </draw:frame>
        <draw:frame draw:style-name="gr28" draw:text-style-name="P8" draw:layer="layout" svg:width="3.622cm" svg:height="1.436cm" svg:x="20.93cm" svg:y="16.321cm">
          <draw:text-box>
            <text:p><text:span text:style-name="T3">Managed Object</text:span></text:p>
            <text:p><text:span text:style-name="T2">MO-N</text:span></text:p>
          </draw:text-box>
        </draw:frame>
        <draw:frame draw:style-name="gr29" draw:text-style-name="P8" draw:layer="layout" svg:width="3.622cm" svg:height="1.436cm" svg:x="14.9cm" svg:y="16.348cm">
          <draw:text-box>
            <text:p><text:span text:style-name="T3">Managed Object</text:span></text:p>
            <text:p><text:span text:style-name="T2">MO-1</text:span></text:p>
          </draw:text-box>
        </draw:frame>
        <draw:frame draw:style-name="gr30" draw:text-style-name="P8" draw:layer="layout" svg:width="3.038cm" svg:height="0.962cm" svg:x="19.855cm" svg:y="19.223cm">
          <draw:text-box>
            <text:p><text:span text:style-name="T2">Param-N</text:span></text:p>
          </draw:text-box>
        </draw:frame>
        <draw:frame draw:style-name="gr31" draw:text-style-name="P8" draw:layer="layout" svg:width="2.932cm" svg:height="0.962cm" svg:x="13.292cm" svg:y="19.104cm">
          <draw:text-box>
            <text:p><text:span text:style-name="T2">Param-1</text:span></text:p>
          </draw:text-box>
        </draw:frame>
        <draw:frame draw:style-name="gr32" draw:text-style-name="P9" draw:layer="layout" svg:width="3.148cm" svg:height="2.54cm" svg:x="20.615cm" svg:y="6.294cm">
          <draw:text-box>
            <text:p><text:span text:style-name="T4">. . .</text:span></text:p>
          </draw:text-box>
        </draw:frame>
        <draw:frame draw:style-name="gr33" draw:text-style-name="P10" draw:layer="layout" svg:width="2.852cm" svg:height="2.143cm" svg:x="25.414cm" svg:y="9.263cm">
          <draw:text-box>
            <text:p><text:span text:style-name="T5">. . .</text:span></text:p>
          </draw:text-box>
        </draw:frame>
        <draw:frame draw:style-name="gr33" draw:text-style-name="P10" draw:layer="layout" svg:width="2.852cm" svg:height="2.143cm" svg:x="17.413cm" svg:y="9.193cm">
          <draw:text-box>
            <text:p><text:span text:style-name="T5">. . .</text:span></text:p>
          </draw:text-box>
        </draw:frame>
        <draw:custom-shape draw:style-name="gr34" draw:text-style-name="P11" draw:layer="layout" svg:width="3.659cm" svg:height="6.685cm" svg:x="6.207cm" svg:y="13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7.493cm" svg:height="1.524cm" svg:x="4.81cm" svg:y="11.58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683cm" svg:height="4.064cm" svg:x="6.21cm" svg:y="7.08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894cm" svg:height="0.962cm" svg:x="6.664cm" svg:y="16.086cm">
          <draw:text-box>
            <text:p>Modules</text:p>
          </draw:text-box>
        </draw:frame>
        <draw:frame draw:style-name="gr38" draw:text-style-name="P14" draw:layer="layout" svg:width="6.454cm" svg:height="0.962cm" svg:x="5.271cm" svg:y="11.841cm">
          <draw:text-box>
            <text:p>CsModulePlayer.mcs</text:p>
          </draw:text-box>
        </draw:frame>
        <draw:frame draw:style-name="gr39" draw:text-style-name="P14" draw:layer="layout" svg:width="2.932cm" svg:height="1.673cm" svg:x="6.58cm" svg:y="8.293cm">
          <draw:text-box>
            <text:p>Web-UI</text:p>
            <text:p>csPlayer</text:p>
          </draw:text-box>
        </draw:frame>
        <draw:frame draw:style-name="gr40" draw:text-style-name="P16" draw:layer="layout" svg:width="26.588cm" svg:height="1.517cm" svg:x="6.797cm" svg:y="1.407cm">
          <draw:text-box>
            <text:p text:style-name="P15"><text:span text:style-name="T1">MaTOOF – Modules and Target Oriented Open Framework</text:span></text:p>
          </draw:text-box>
        </draw:frame>
        <draw:frame draw:style-name="gr32" draw:text-style-name="P9" draw:layer="layout" svg:width="3.148cm" svg:height="2.54cm" svg:x="21.701cm" svg:y="12.43cm">
          <draw:text-box>
            <text:p><text:span text:style-name="T4">. . 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2-26T21:44:36.472897450</dc:date>
    <meta:editing-cycles>76</meta:editing-cycles>
    <meta:editing-duration>PT9H20M24S</meta:editing-duration>
    <meta:print-date>2017-04-17T17:26:32.987291272</meta:print-date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