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AE5F3B913BBF8A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afd095" draw:opacity="100%" draw:textarea-horizontal-align="justify" draw:textarea-vertical-align="middle" draw:auto-grow-height="false" fo:min-height="16.815cm" fo:min-width="0.69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127622" draw:marker-start-width="0.358cm" draw:marker-end-width="0.358cm" draw:fill-color="#78df9b" draw:textarea-horizontal-align="justify" draw:textarea-vertical-align="middle" draw:auto-grow-height="false" fo:min-height="3.092cm" fo:min-width="9.98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127622" draw:marker-start-width="0.359cm" draw:marker-end-width="0.359cm" draw:fill-color="#afd095" draw:textarea-horizontal-align="justify" draw:textarea-vertical-align="middle" draw:auto-grow-height="false" fo:min-height="3.312cm" fo:min-width="10.85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27622" draw:marker-start-width="0.359cm" draw:marker-end-width="0.359cm" draw:fill-color="#ffdbb6" draw:textarea-horizontal-align="justify" draw:textarea-vertical-align="middle" draw:auto-grow-height="false" fo:min-height="4.183cm" fo:min-width="11.79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127622" draw:marker-start-width="0.359cm" draw:marker-end-width="0.359cm" draw:fill-color="#b4c7dc" draw:textarea-horizontal-align="justify" draw:textarea-vertical-align="middle" draw:auto-grow-height="false" fo:min-height="3.998cm" fo:min-width="12.64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127622" draw:marker-start-width="0.359cm" draw:marker-end-width="0.359cm" draw:fill-color="#ffde59" draw:textarea-horizontal-align="justify" draw:textarea-vertical-align="middle" draw:auto-grow-height="false" fo:min-height="2.83cm" fo:min-width="13.62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127622" draw:marker-start-width="0.359cm" draw:marker-end-width="0.359cm" draw:fill-color="#78df9b" draw:textarea-horizontal-align="justify" draw:textarea-vertical-align="middle" draw:auto-grow-height="false" fo:min-height="3.56cm" fo:min-width="0.43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f819e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f819e" draw:textarea-horizontal-align="left" draw:auto-grow-height="true" draw:auto-grow-width="true" fo:min-height="0.712cm" fo:min-width="8.9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6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24cm"/>
      <style:paragraph-properties style:writing-mode="lr-tb"/>
    </style:style>
    <style:style style:name="gr28" style:family="graphic" style:parent-style-name="standard">
      <style:graphic-properties svg:stroke-width="0.106cm" svg:stroke-color="#127622" draw:marker-start-width="0.359cm" draw:marker-end-width="0.359cm" draw:fill-color="#77bc65" draw:textarea-horizontal-align="justify" draw:textarea-vertical-align="middle" draw:auto-grow-height="false" fo:min-height="4.195cm" fo:min-width="0.43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127622" draw:marker-start-width="0.359cm" draw:marker-end-width="0.359cm" draw:fill-color="#ffdbb6" draw:textarea-horizontal-align="justify" draw:textarea-vertical-align="middle" draw:auto-grow-height="false" fo:min-height="5.147cm" fo:min-width="0.43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27622" draw:marker-start-width="0.359cm" draw:marker-end-width="0.359cm" draw:fill-color="#b4c7dc" draw:textarea-horizontal-align="justify" draw:textarea-vertical-align="middle" draw:auto-grow-height="false" fo:min-height="4.959cm" fo:min-width="0.4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127622" draw:marker-start-width="0.359cm" draw:marker-end-width="0.359cm" draw:fill-color="#ffde59" draw:textarea-horizontal-align="justify" draw:textarea-vertical-align="middle" draw:auto-grow-height="false" fo:min-height="3.606cm" fo:min-width="0.324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917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4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38cm"/>
      <style:paragraph-properties style:writing-mode="lr-tb"/>
    </style:style>
    <style:style style:name="gr39" style:family="graphic" style:parent-style-name="standard">
      <style:graphic-properties draw:fill-color="#ff7b59" draw:textarea-horizontal-align="justify" draw:textarea-vertical-align="middle" draw:auto-grow-height="false" fo:min-height="14.99cm" fo:min-width="0.77cm"/>
    </style:style>
    <style:style style:name="gr40" style:family="graphic" style:parent-style-name="standard">
      <style:graphic-properties draw:fill-color="#ff5429" draw:textarea-horizontal-align="justify" draw:textarea-vertical-align="middle" draw:auto-grow-height="false" fo:min-height="4.453cm" fo:min-width="0.77cm"/>
    </style:style>
    <style:style style:name="gr41" style:family="graphic" style:parent-style-name="standard">
      <style:graphic-properties draw:fill-color="#ff7b59" draw:textarea-horizontal-align="justify" draw:textarea-vertical-align="middle" draw:auto-grow-height="false" fo:min-height="1.263cm" fo:min-width="0.77cm"/>
    </style:style>
    <style:style style:name="gr42" style:family="graphic" style:parent-style-name="standard">
      <style:graphic-properties draw:fill-color="#ff7b59" draw:textarea-horizontal-align="justify" draw:textarea-vertical-align="middle" draw:auto-grow-height="false" fo:min-height="1.561cm" fo:min-width="0.77cm"/>
    </style:style>
    <style:style style:name="gr43" style:family="graphic" style:parent-style-name="standard">
      <style:graphic-properties draw:fill-color="#ff5429" draw:textarea-horizontal-align="justify" draw:textarea-vertical-align="middle" draw:auto-grow-height="false" fo:min-height="0.86cm" fo:min-width="0.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4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7.37cm" fo:min-width="0.77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24.197cm" fo:min-width="0.77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49" style:family="graphic" style:parent-style-name="objectwithoutfill">
      <style:graphic-properties draw:stroke="dash" draw:stroke-dash="Dash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solid" draw:fill-color="#afd095" draw:opacity="100%"/>
      <style:paragraph-properties fo:text-align="center"/>
    </style:style>
    <style:style style:name="P3" style:family="paragraph">
      <loext:graphic-properties draw:fill-color="#78df9b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ffde59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weight="bold" fo:background-color="#ffd8ce"/>
    </style:style>
    <style:style style:name="P10" style:family="paragraph">
      <style:paragraph-properties fo:margin-top="0.203cm" fo:margin-bottom="0cm"/>
    </style:style>
    <style:style style:name="P11" style:family="paragraph">
      <loext:graphic-properties draw:fill="none" draw:fill-color="#bf819e"/>
      <style:paragraph-properties fo:margin-top="0.203cm" fo:margin-bottom="0cm" style:writing-mode="lr-tb"/>
      <style:text-properties fo:color="#ff0000" loext:opacity="100%" fo:font-size="18pt" fo:font-weight="bold" fo:background-color="#ffffff" style:font-size-asian="16pt" style:font-size-complex="16pt"/>
    </style:style>
    <style:style style:name="P12" style:family="paragraph">
      <loext:graphic-properties draw:fill="none" draw:fill-color="#bf819e"/>
      <style:paragraph-properties fo:margin-top="0.203cm" fo:margin-bottom="0cm" style:writing-mode="lr-tb"/>
      <style:text-properties fo:color="#000000" loext:opacity="100%" fo:font-size="18pt" fo:background-color="#78df9b"/>
    </style:style>
    <style:style style:name="P13" style:family="paragraph">
      <loext:graphic-properties draw:fill="none" draw:fill-color="#bf819e"/>
      <style:paragraph-properties fo:margin-top="0.203cm" fo:margin-bottom="0cm" style:writing-mode="lr-tb"/>
      <style:text-properties fo:color="#000000" loext:opacity="100%" fo:background-color="#78df9b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weight="bold" fo:background-color="#ffd8ce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0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20" style:family="paragraph">
      <loext:graphic-properties draw:fill="none" draw:fill-color="#ffffff"/>
      <style:paragraph-properties style:writing-mode="lr-tb"/>
      <style:text-properties fo:font-size="10.5pt" fo:font-weight="bold"/>
    </style:style>
    <style:style style:name="P21" style:family="paragraph">
      <loext:graphic-properties draw:fill-color="#ff7b59"/>
      <style:paragraph-properties fo:text-align="center"/>
    </style:style>
    <style:style style:name="P22" style:family="paragraph">
      <loext:graphic-properties draw:fill-color="#ff5429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weight="bold" fo:background-color="#ffd8ce"/>
    </style:style>
    <style:style style:name="T2" style:family="text">
      <style:text-properties fo:color="#ff0000" loext:opacity="100%" fo:font-size="18pt" fo:font-weight="bold" fo:background-color="#ffffff" style:font-size-asian="16pt" style:font-size-complex="16pt"/>
    </style:style>
    <style:style style:name="T3" style:family="text">
      <style:text-properties fo:color="#000000" loext:opacity="100%" fo:font-size="18pt" fo:background-color="#78df9b"/>
    </style:style>
    <style:style style:name="T4" style:family="text">
      <style:text-properties fo:color="#000000" loext:opacity="100%" fo:background-color="#78df9b"/>
    </style:style>
    <style:style style:name="T5" style:family="text">
      <style:text-properties fo:color="#ff0000" loext:opacity="100%" fo:font-weight="bold" fo:background-color="#ffd8ce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font-size="10pt" fo:font-weight="bold" style:font-size-asian="11pt" style:font-weight-asian="bold" style:font-size-complex="11pt" style:font-weight-complex="bold"/>
    </style:style>
    <style:style style:name="T8" style:family="text">
      <style:text-properties fo:font-size="10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/>
    </style:style>
    <style:style style:name="T10" style:family="text">
      <style:text-properties fo:font-size="10.5pt" fo:font-weight="bold"/>
    </style:style>
    <style:style style:name="T11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27cm" svg:height="29.527cm" svg:x="25.4cm" svg:y="-0.635cm">
          <draw:image xlink:href="Pictures/100000000000025800000258AE5F3B913BBF8A81.png" xlink:type="simple" xlink:show="embed" xlink:actuate="onLoad" draw:mime-type="image/png">
            <text:p/>
          </draw:image>
        </draw:frame>
        <draw:custom-shape draw:style-name="gr2" draw:text-style-name="P2" draw:layer="layout" svg:width="1.27cm" svg:height="17.145cm" svg:x="26.352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115cm" svg:height="4.27cm" draw:transform="rotate (-3.14159265358979) translate (18.299cm 6.222cm)">
          <text:p/>
          <draw:enhanced-geometry svg:viewBox="0 0 21600 21600" draw:glue-points="?f6 10800 10800 21600 ?f5 10800 10800 0" draw:text-areas="?f3 ?f3 ?f4 ?f4" draw:type="trapezoid" draw:modifiers="602.7447392497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14.066cm" svg:height="4.412cm" draw:transform="rotate (-3.14159265358979) translate (18.774cm 10.842cm)">
          <text:p/>
          <draw:enhanced-geometry svg:viewBox="0 0 21600 21600" draw:glue-points="?f6 10800 10800 21600 ?f5 10800 10800 0" draw:text-areas="?f3 ?f3 ?f4 ?f4" draw:type="trapezoid" draw:modifiers="735.5086372360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15.24cm" svg:height="5.493cm" draw:transform="rotate (-3.14159265358979) translate (19.415cm 16.557cm)">
          <text:p/>
          <draw:enhanced-geometry svg:viewBox="0 0 21600 21600" draw:glue-points="?f6 10800 10800 21600 ?f5 10800 10800 0" draw:text-areas="?f3 ?f3 ?f4 ?f4" draw:type="trapezoid" draw:modifiers="809.23823896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16.51cm" svg:height="5.334cm" draw:transform="rotate (-3.14159265358979) translate (20.082cm 22.081cm)">
          <text:p/>
          <draw:enhanced-geometry svg:viewBox="0 0 21600 21600" draw:glue-points="?f6 10800 10800 21600 ?f5 10800 10800 0" draw:text-areas="?f3 ?f3 ?f4 ?f4" draw:type="trapezoid" draw:modifiers="809.23823896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17.475cm" svg:height="3.81cm" draw:transform="rotate (-3.14159265358979) translate (20.537cm 26.147cm)">
          <text:p/>
          <draw:enhanced-geometry svg:viewBox="0 0 21600 21600" draw:glue-points="?f6 10800 10800 21600 ?f5 10800 10800 0" draw:text-areas="?f3 ?f3 ?f4 ?f4" draw:type="trapezoid" draw:modifiers="577.6552694856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3" draw:layer="layout" svg:width="0.93cm" svg:height="3.81cm" svg:x="1.312cm" svg:y="2.30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8.572cm" svg:height="0.962cm" svg:x="4.079cm" svg:y="24.862cm">
          <draw:text-box>
            <text:p>2- Nature of polyexistentials</text:p>
          </draw:text-box>
        </draw:frame>
        <draw:frame draw:style-name="gr10" draw:text-style-name="P9" draw:layer="layout" svg:width="5.476cm" svg:height="0.962cm" svg:x="8.62cm" svg:y="22.263cm">
          <draw:text-box>
            <text:p><text:span text:style-name="T1"><text:s/></text:span><text:span text:style-name="T1">I: Polyexistence</text:span></text:p>
          </draw:text-box>
        </draw:frame>
        <draw:frame draw:style-name="gr11" draw:text-style-name="P8" draw:layer="layout" svg:width="7.47cm" svg:height="0.962cm" svg:x="4.052cm" svg:y="24.044cm">
          <draw:text-box>
            <text:p>3- Digital polyexistentials</text:p>
          </draw:text-box>
        </draw:frame>
        <draw:frame draw:style-name="gr12" draw:text-style-name="P8" draw:layer="layout" svg:width="12.021cm" svg:height="0.962cm" svg:x="4.037cm" svg:y="23.151cm">
          <draw:text-box>
            <text:p>4- Proper Governance of Polyexistentials</text:p>
          </draw:text-box>
        </draw:frame>
        <draw:frame draw:style-name="gr13" draw:text-style-name="P11" draw:layer="layout" svg:width="11.342cm" svg:height="0.962cm" svg:x="6.08cm" svg:y="2.26cm">
          <draw:text-box>
            <text:p text:style-name="P10"><text:span text:style-name="T2"><text:s/></text:span><text:span text:style-name="T2">V: Formulation of <text:s/>Societal Policies</text:span></text:p>
          </draw:text-box>
        </draw:frame>
        <draw:frame draw:style-name="gr13" draw:text-style-name="P12" draw:layer="layout" svg:width="7.368cm" svg:height="0.962cm" svg:x="5.462cm" svg:y="5.235cm">
          <draw:text-box>
            <text:p text:style-name="P10"><text:span text:style-name="T3">19- Societal <text:s/>Strategies</text:span></text:p>
          </draw:text-box>
        </draw:frame>
        <draw:frame draw:style-name="gr13" draw:text-style-name="P13" draw:layer="layout" svg:width="11.538cm" svg:height="0.962cm" svg:x="5.462cm" svg:y="4.592cm">
          <draw:text-box>
            <text:p text:style-name="P10"><text:span text:style-name="T4">20- Theoretical Western Societal Cures</text:span></text:p>
          </draw:text-box>
        </draw:frame>
        <draw:frame draw:style-name="gr14" draw:text-style-name="P13" draw:layer="layout" svg:width="9.417cm" svg:height="0.962cm" svg:x="5.462cm" svg:y="3.122cm">
          <draw:text-box>
            <text:p text:style-name="P10"><text:span text:style-name="T4">22- Eastern Societal Strategies </text:span></text:p>
          </draw:text-box>
        </draw:frame>
        <draw:frame draw:style-name="gr15" draw:text-style-name="P14" draw:layer="layout" svg:width="12.952cm" svg:height="0.962cm" svg:x="5.219cm" svg:y="6.591cm">
          <draw:text-box>
            <text:p><text:span text:style-name="T5">IV: Libre-Halaal ByStar Digital Ecosystem</text:span></text:p>
          </draw:text-box>
        </draw:frame>
        <draw:frame draw:style-name="gr9" draw:text-style-name="P8" draw:layer="layout" svg:width="13.189cm" svg:height="0.962cm" svg:x="4.856cm" svg:y="9.79cm">
          <draw:text-box>
            <text:p>15- Theory of Libre-Halaal Digital Ecosystem</text:p>
          </draw:text-box>
        </draw:frame>
        <draw:frame draw:style-name="gr16" draw:text-style-name="P8" draw:layer="layout" svg:width="12.361cm" svg:height="0.962cm" svg:x="4.81cm" svg:y="9.02cm">
          <draw:text-box>
            <text:p>16- Libre-Halaal ByStar Digital Ecosystem</text:p>
          </draw:text-box>
        </draw:frame>
        <draw:frame draw:style-name="gr17" draw:text-style-name="P8" draw:layer="layout" svg:width="9.87cm" svg:height="0.962cm" svg:x="4.887cm" svg:y="8.202cm">
          <draw:text-box>
            <text:p>17- Technology of ByStar: BISOS</text:p>
          </draw:text-box>
        </draw:frame>
        <draw:frame draw:style-name="gr18" draw:text-style-name="P9" draw:layer="layout" svg:width="7.178cm" svg:height="0.962cm" svg:x="8.319cm" svg:y="11.307cm">
          <draw:text-box>
            <text:p><text:span text:style-name="T1">III: Contours of Cures </text:span></text:p>
          </draw:text-box>
        </draw:frame>
        <draw:frame draw:style-name="gr9" draw:text-style-name="P8" draw:layer="layout" svg:width="7.082cm" svg:height="0.962cm" svg:x="4.578cm" svg:y="15.495cm">
          <draw:text-box>
            <text:p>10- Dynamics of Cures</text:p>
          </draw:text-box>
        </draw:frame>
        <draw:frame draw:style-name="gr19" draw:text-style-name="P15" draw:layer="layout" svg:width="13.871cm" svg:height="0.962cm" svg:x="4.587cm" svg:y="14.643cm">
          <draw:text-box>
            <text:p><text:span text:style-name="T6">11- Introducing Halaal and Haraam Into Globish</text:span></text:p>
          </draw:text-box>
        </draw:frame>
        <draw:frame draw:style-name="gr20" draw:text-style-name="P8" draw:layer="layout" svg:width="11.454cm" svg:height="0.962cm" svg:x="4.59cm" svg:y="13.764cm">
          <draw:text-box>
            <text:p>12- Digital Non-Proprietary Movements</text:p>
          </draw:text-box>
        </draw:frame>
        <draw:frame draw:style-name="gr21" draw:text-style-name="P8" draw:layer="layout" svg:width="10.781cm" svg:height="0.962cm" svg:x="4.624cm" svg:y="12.955cm">
          <draw:text-box>
            <text:p>13- Global Polyexistential Capitalism</text:p>
          </draw:text-box>
        </draw:frame>
        <draw:frame draw:style-name="gr22" draw:text-style-name="P8" draw:layer="layout" svg:width="9.371cm" svg:height="0.962cm" svg:x="4.646cm" svg:y="12.112cm">
          <draw:text-box>
            <text:p>14- Ethical and Religious Cures</text:p>
          </draw:text-box>
        </draw:frame>
        <draw:frame draw:style-name="gr23" draw:text-style-name="P14" draw:layer="layout" svg:width="15.56cm" svg:height="0.962cm" svg:x="4.157cm" svg:y="16.908cm">
          <draw:text-box>
            <text:p><text:span text:style-name="T5">II: The Mistake: Myths of the Western IPR Regime </text:span></text:p>
          </draw:text-box>
        </draw:frame>
        <draw:frame draw:style-name="gr24" draw:text-style-name="P8" draw:layer="layout" svg:width="11.915cm" svg:height="0.962cm" svg:x="4.075cm" svg:y="20.893cm">
          <draw:text-box>
            <text:p>5- Dynamics of the Western IPR Mistake</text:p>
          </draw:text-box>
        </draw:frame>
        <draw:frame draw:style-name="gr25" draw:text-style-name="P8" draw:layer="layout" svg:width="14.294cm" svg:height="1.144cm" svg:x="4.054cm" svg:y="19.38cm">
          <draw:text-box>
            <text:p>7- Western Slavery and the Western IPR Regime</text:p>
          </draw:text-box>
        </draw:frame>
        <draw:frame draw:style-name="gr9" draw:text-style-name="P8" draw:layer="layout" svg:width="13.706cm" svg:height="0.962cm" svg:x="4.021cm" svg:y="20.061cm">
          <draw:text-box>
            <text:p>6- Debunking the Myth of Western IPR Regime</text:p>
          </draw:text-box>
        </draw:frame>
        <draw:frame draw:style-name="gr26" draw:text-style-name="P8" draw:layer="layout" svg:width="12.935cm" svg:height="0.962cm" svg:x="4.04cm" svg:y="18.562cm">
          <draw:text-box>
            <text:p>8- Ramifications of the Western IPR Mistake</text:p>
          </draw:text-box>
        </draw:frame>
        <draw:frame draw:style-name="gr27" draw:text-style-name="P8" draw:layer="layout" svg:width="11.924cm" svg:height="0.962cm" svg:x="3.999cm" svg:y="17.741cm">
          <draw:text-box>
            <text:p>9- Americanism: Root of the IPR Mistake</text:p>
          </draw:text-box>
        </draw:frame>
        <draw:custom-shape draw:style-name="gr28" draw:text-style-name="P16" draw:layer="layout" svg:width="0.93cm" svg:height="4.445cm" svg:x="1.345cm" svg:y="6.3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93cm" svg:height="5.397cm" svg:x="1.344cm" svg:y="11.19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93cm" svg:height="5.209cm" svg:x="1.291cm" svg:y="16.7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3cm" svg:height="3.962cm" svg:x="1.345cm" svg:y="2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0.642cm" svg:height="3.797cm" draw:transform="rotate (-0.00663225115757917) translate (1.471cm 2.279cm)">
          <draw:text-box>
            <text:p><text:span text:style-name="T7">SOCIOLOGY</text:span></text:p>
          </draw:text-box>
        </draw:frame>
        <draw:frame draw:style-name="gr33" draw:text-style-name="P18" draw:layer="layout" svg:width="0.751cm" svg:height="2.982cm" svg:x="1.452cm" svg:y="12.305cm">
          <draw:text-box>
            <text:p><text:span text:style-name="T8">ETHICS</text:span></text:p>
          </draw:text-box>
        </draw:frame>
        <draw:frame draw:style-name="gr34" draw:text-style-name="P19" draw:layer="layout" svg:width="0.638cm" svg:height="4.167cm" draw:transform="rotate (-0.00261799387799158) translate (1.503cm 6.59cm)">
          <draw:text-box>
            <text:p><text:span text:style-name="T9">ENGINEERING</text:span></text:p>
          </draw:text-box>
        </draw:frame>
        <draw:frame draw:style-name="gr35" draw:text-style-name="P20" draw:layer="layout" svg:width="0.635cm" svg:height="3.95cm" svg:x="1.368cm" svg:y="17.421cm">
          <draw:text-box>
            <text:p><text:span text:style-name="T10">PATHOLOGY</text:span></text:p>
          </draw:text-box>
        </draw:frame>
        <draw:frame draw:style-name="gr36" draw:text-style-name="P17" draw:layer="layout" svg:width="0.635cm" svg:height="4.191cm" svg:x="1.414cm" svg:y="22.209cm">
          <draw:text-box>
            <text:p><text:span text:style-name="T11">PHILOSOPHY</text:span></text:p>
          </draw:text-box>
        </draw:frame>
        <draw:frame draw:style-name="gr37" draw:text-style-name="P8" draw:layer="layout" svg:width="13.748cm" svg:height="0.962cm" svg:x="4.92cm" svg:y="7.44cm">
          <draw:text-box>
            <text:p>18- Engineering Adoption of BISOS and ByStar</text:p>
          </draw:text-box>
        </draw:frame>
        <draw:frame draw:style-name="gr38" draw:text-style-name="P8" draw:layer="layout" svg:width="12.838cm" svg:height="0.962cm" svg:x="5.445cm" svg:y="3.857cm">
          <draw:text-box>
            <text:p>21- Private Sector: By* Open Business Plan</text:p>
          </draw:text-box>
        </draw:frame>
        <draw:custom-shape draw:style-name="gr39" draw:text-style-name="P21" draw:layer="layout" svg:width="1.27cm" svg:height="15.24cm" svg:x="21.59cm" svg:y="11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1.27cm" svg:height="4.703cm" draw:transform="skewX (-0.0394444410950718) rotate (-0.0312413936106995) translate (23.695cm 6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1.27cm" svg:height="1.513cm" svg:x="21.618cm" svg:y="1.8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.27cm" svg:height="1.811cm" svg:x="21.59cm" svg:y="4.4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1.27cm" svg:height="1.11cm" svg:x="23.665cm" svg:y="3.503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3.537cm" svg:height="0.962cm" draw:transform="rotate (1.5707963267949) translate (21.738cm 19.347cm)">
          <draw:text-box>
            <text:p>VOLUME I</text:p>
          </draw:text-box>
        </draw:frame>
        <draw:frame draw:style-name="gr45" draw:text-style-name="P8" draw:layer="layout" svg:width="16.192cm" svg:height="1.27cm" draw:transform="rotate (1.5707963267949) translate (26.452cm 19.602cm)">
          <draw:text-box>
            <text:p>ByStar Software <text:s/>and <text:s/>Internet <text:s/>Application <text:s/>Services</text:p>
          </draw:text-box>
        </draw:frame>
        <draw:custom-shape draw:style-name="gr46" draw:text-style-name="P23" draw:layer="layout" svg:width="1.27cm" svg:height="7.62cm" svg:x="23.712cm" svg:y="3.49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27cm" svg:height="24.447cm" svg:x="21.59cm" svg:y="1.905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3.715cm" svg:height="0.962cm" draw:transform="rotate (1.5707963267949) translate (23.871cm 10.397cm)">
          <draw:text-box>
            <text:p>VOLUME II</text:p>
          </draw:text-box>
        </draw:frame>
        <draw:line draw:style-name="gr49" draw:text-style-name="P24" draw:layer="layout" svg:x1="24.977cm" svg:y1="11.113cm" svg:x2="26.257cm" svg:y2="20.637cm">
          <text:p/>
        </draw:line>
        <draw:line draw:style-name="gr49" draw:text-style-name="P24" draw:layer="layout" svg:x1="24.982cm" svg:y1="3.531cm" svg:x2="26.303cm" svg:y2="3.531cm">
          <text:p/>
        </draw:line>
        <draw:line draw:style-name="gr50" draw:text-style-name="P24" draw:layer="layout" svg:x1="25.4cm" svg:y1="0cm" svg:x2="0cm" svg:y2="0cm">
          <text:p/>
        </draw:line>
        <draw:line draw:style-name="gr50" draw:text-style-name="P24" draw:layer="layout" svg:x1="0cm" svg:y1="0cm" svg:x2="0cm" svg:y2="27.94cm">
          <text:p/>
        </draw:line>
        <draw:line draw:style-name="gr50" draw:text-style-name="P24" draw:layer="layout" svg:x1="0cm" svg:y1="27.94cm" svg:x2="25.4cm" svg:y2="27.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657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1:30:53.776661453</meta:creation-date>
    <dc:date>2025-11-24T21:33:30.721801287</dc:date>
    <meta:editing-duration>PT6H16M46S</meta:editing-duration>
    <meta:editing-cycles>16</meta:editing-cycles>
    <meta:generator>LibreOffice/7.0.4.2$Linux_X86_64 LibreOffice_project/00$Build-2</meta:generator>
    <meta:print-date>2024-10-17T22:12:31.650334908</meta:print-date>
    <meta:document-statistic meta:object-count="58"/>
  </office:meta>
</office:document-meta>
</file>