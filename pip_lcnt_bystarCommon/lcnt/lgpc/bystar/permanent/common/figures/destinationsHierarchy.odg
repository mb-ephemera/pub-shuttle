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0.919cm" fo:min-width="3.003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0.919cm" fo:min-width="3.003cm"/>
    </style:style>
    <style:style style:name="gr3" style:family="graphic" style:parent-style-name="standard">
      <style:graphic-properties svg:stroke-width="0.035cm" draw:marker-start-width="0.352cm" draw:marker-end-width="0.352cm" draw:fill-color="#ff860d" draw:textarea-horizontal-align="justify" draw:textarea-vertical-align="middle" draw:auto-grow-height="false" fo:min-height="0.919cm" fo:min-width="3.003cm" fo:padding-top="0.142cm" fo:padding-bottom="0.142cm" fo:padding-left="0.267cm" fo:padding-right="0.26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919cm" fo:min-width="3.003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0.919cm" fo:min-width="3.003cm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919cm" fo:min-width="3.003cm"/>
    </style:style>
    <style:style style:name="gr7" style:family="graphic" style:parent-style-name="objectwithoutfill">
      <style:graphic-properties svg:stroke-width="0.159cm" svg:stroke-color="#c9211e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draw:marker-end="Arrowheads_20_45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heads_20_46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heads_20_47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Arrowheads_20_48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heads_20_49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Arrowheads_20_50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heads_20_51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heads_20_52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marker-end="Arrowheads_20_53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heads_20_54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9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0.8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12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.64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.352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ff860d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54pt" style:font-size-asian="48pt" style:font-size-complex="48pt"/>
    </style:style>
    <style:style style:name="P10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style:font-size-asian="48pt" style:font-size-complex="48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953cm" svg:height="1.651cm" svg:x="9.76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1.651cm" svg:x="17.761cm" svg:y="8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1.651cm" svg:x="25.508cm" svg:y="8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53cm" svg:height="1.651cm" svg:x="13.18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953cm" svg:height="1.651cm" svg:x="12.3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953cm" svg:height="1.651cm" svg:x="21.8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53cm" svg:height="1.651cm" svg:x="22.684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53cm" svg:height="1.651cm" svg:x="11.495cm" svg:y="14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53cm" svg:height="1.651cm" svg:x="17.472cm" svg:y="14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953cm" svg:height="1.651cm" svg:x="9.633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953cm" svg:height="1.651cm" svg:x="16.11cm" svg:y="1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7cm" svg:y1="1cm" svg:x2="36.56cm" svg:y2="1cm">
          <text:p/>
        </draw:line>
        <draw:line draw:style-name="gr8" draw:text-style-name="P6" draw:layer="layout" svg:x1="36.56cm" svg:y1="1cm" svg:x2="36.56cm" svg:y2="21.86cm">
          <text:p/>
        </draw:line>
        <draw:line draw:style-name="gr8" draw:text-style-name="P6" draw:layer="layout" svg:x1="2.24cm" svg:y1="1cm" svg:x2="2.24cm" svg:y2="21.86cm">
          <text:p/>
        </draw:line>
        <draw:line draw:style-name="gr8" draw:text-style-name="P6" draw:layer="layout" svg:x1="2.27cm" svg:y1="21.86cm" svg:x2="36.56cm" svg:y2="21.86cm">
          <text:p/>
        </draw:line>
        <draw:line draw:style-name="gr9" draw:text-style-name="P6" draw:layer="layout" svg:x1="13.951cm" svg:y1="7.731cm" svg:x2="13.413cm" svg:y2="8.874cm">
          <text:p/>
        </draw:line>
        <draw:line draw:style-name="gr10" draw:text-style-name="P6" draw:layer="layout" svg:x1="15.348cm" svg:y1="7.731cm" svg:x2="18.112cm" svg:y2="9.382cm">
          <text:p/>
        </draw:line>
        <draw:line draw:style-name="gr11" draw:text-style-name="P6" draw:layer="layout" svg:x1="23.73cm" svg:y1="7.858cm" svg:x2="22.049cm" svg:y2="9.255cm">
          <text:p/>
        </draw:line>
        <draw:line draw:style-name="gr12" draw:text-style-name="P6" draw:layer="layout" svg:x1="24.873cm" svg:y1="7.858cm" svg:x2="26.494cm" svg:y2="9.001cm">
          <text:p/>
        </draw:line>
        <draw:line draw:style-name="gr13" draw:text-style-name="P6" draw:layer="layout" svg:x1="19.89cm" svg:y1="10.525cm" svg:x2="17.256cm" svg:y2="12.43cm">
          <text:p/>
        </draw:line>
        <draw:line draw:style-name="gr14" draw:text-style-name="P6" draw:layer="layout" svg:x1="19.763cm" svg:y1="10.525cm" svg:x2="22.971cm" svg:y2="12.684cm">
          <text:p/>
        </draw:line>
        <draw:line draw:style-name="gr15" draw:text-style-name="P6" draw:layer="layout" svg:x1="15.699cm" svg:y1="13.805cm" svg:x2="15.064cm" svg:y2="15.075cm">
          <text:p/>
        </draw:line>
        <draw:line draw:style-name="gr16" draw:text-style-name="P6" draw:layer="layout" svg:x1="15.699cm" svg:y1="13.805cm" svg:x2="18.112cm" svg:y2="15.202cm">
          <text:p/>
        </draw:line>
        <draw:line draw:style-name="gr17" draw:text-style-name="P6" draw:layer="layout" svg:x1="14.048cm" svg:y1="16.599cm" svg:x2="13.159cm" svg:y2="17.615cm">
          <text:p/>
        </draw:line>
        <draw:line draw:style-name="gr18" draw:text-style-name="P6" draw:layer="layout" svg:x1="14.175cm" svg:y1="16.599cm" svg:x2="16.842cm" svg:y2="17.869cm">
          <text:p/>
        </draw:line>
        <draw:frame draw:style-name="gr19" draw:text-style-name="P7" draw:layer="layout" svg:width="29.75cm" svg:height="1.432cm" svg:x="6.147cm" svg:y="1.868cm">
          <draw:text-box>
            <text:p><text:span text:style-name="T1">Clusters, Destinations, Targets, Managed Objects, Parameters</text:span></text:p>
          </draw:text-box>
        </draw:frame>
        <draw:frame draw:style-name="gr20" draw:text-style-name="P7" draw:layer="layout" svg:width="11.322cm" svg:height="1.432cm" svg:x="15.124cm" svg:y="3.486cm">
          <draw:text-box>
            <text:p><text:span text:style-name="T1">Containment Hierarchy</text:span></text:p>
          </draw:text-box>
        </draw:frame>
        <draw:frame draw:style-name="gr21" draw:text-style-name="P8" draw:layer="layout" svg:width="3.072cm" svg:height="0.962cm" svg:x="13.262cm" svg:y="6.491cm">
          <draw:text-box>
            <text:p><text:span text:style-name="T2">Cluster-1</text:span></text:p>
          </draw:text-box>
        </draw:frame>
        <draw:frame draw:style-name="gr22" draw:text-style-name="P8" draw:layer="layout" svg:width="3.177cm" svg:height="0.962cm" svg:x="22.814cm" svg:y="6.591cm">
          <draw:text-box>
            <text:p><text:span text:style-name="T2">Cluster-N</text:span></text:p>
          </draw:text-box>
        </draw:frame>
        <draw:frame draw:style-name="gr23" draw:text-style-name="P8" draw:layer="layout" svg:width="2.826cm" svg:height="0.962cm" svg:x="14.246cm" svg:y="12.573cm">
          <draw:text-box>
            <text:p><text:span text:style-name="T2">Target-1</text:span></text:p>
          </draw:text-box>
        </draw:frame>
        <draw:frame draw:style-name="gr24" draw:text-style-name="P8" draw:layer="layout" svg:width="4.232cm" svg:height="0.962cm" svg:x="10.073cm" svg:y="9.163cm">
          <draw:text-box>
            <text:p><text:span text:style-name="T2">Destination-1</text:span></text:p>
          </draw:text-box>
        </draw:frame>
        <draw:frame draw:style-name="gr25" draw:text-style-name="P8" draw:layer="layout" svg:width="4.409cm" svg:height="0.962cm" svg:x="18.015cm" svg:y="9.236cm">
          <draw:text-box>
            <text:p><text:span text:style-name="T2">Destination-M</text:span></text:p>
          </draw:text-box>
        </draw:frame>
        <draw:frame draw:style-name="gr26" draw:text-style-name="P8" draw:layer="layout" svg:width="4.337cm" svg:height="0.962cm" svg:x="25.848cm" svg:y="9.236cm">
          <draw:text-box>
            <text:p><text:span text:style-name="T2">Destination-N</text:span></text:p>
          </draw:text-box>
        </draw:frame>
        <draw:frame draw:style-name="gr27" draw:text-style-name="P8" draw:layer="layout" svg:width="2.932cm" svg:height="1.078cm" svg:x="23.695cm" svg:y="12.446cm">
          <draw:text-box>
            <text:p><text:span text:style-name="T2">Target-N</text:span></text:p>
          </draw:text-box>
        </draw:frame>
        <draw:frame draw:style-name="gr28" draw:text-style-name="P8" draw:layer="layout" svg:width="3.622cm" svg:height="1.436cm" svg:x="18.23cm" svg:y="15.121cm">
          <draw:text-box>
            <text:p><text:span text:style-name="T3">Managed Object</text:span></text:p>
            <text:p><text:span text:style-name="T2">MO-N</text:span></text:p>
          </draw:text-box>
        </draw:frame>
        <draw:frame draw:style-name="gr29" draw:text-style-name="P8" draw:layer="layout" svg:width="3.622cm" svg:height="1.436cm" svg:x="12.2cm" svg:y="15.148cm">
          <draw:text-box>
            <text:p><text:span text:style-name="T3">Managed Object</text:span></text:p>
            <text:p><text:span text:style-name="T2">MO-1</text:span></text:p>
          </draw:text-box>
        </draw:frame>
        <draw:frame draw:style-name="gr30" draw:text-style-name="P8" draw:layer="layout" svg:width="3.038cm" svg:height="0.962cm" svg:x="17.155cm" svg:y="18.023cm">
          <draw:text-box>
            <text:p><text:span text:style-name="T2">Param-N</text:span></text:p>
          </draw:text-box>
        </draw:frame>
        <draw:frame draw:style-name="gr31" draw:text-style-name="P8" draw:layer="layout" svg:width="2.932cm" svg:height="0.962cm" svg:x="10.592cm" svg:y="17.904cm">
          <draw:text-box>
            <text:p><text:span text:style-name="T2">Param-1</text:span></text:p>
          </draw:text-box>
        </draw:frame>
        <draw:frame draw:style-name="gr32" draw:text-style-name="P9" draw:layer="layout" svg:width="3.148cm" svg:height="2.54cm" svg:x="18.272cm" svg:y="5.318cm">
          <draw:text-box>
            <text:p><text:span text:style-name="T4">. . .</text:span></text:p>
          </draw:text-box>
        </draw:frame>
        <draw:frame draw:style-name="gr33" draw:text-style-name="P10" draw:layer="layout" svg:width="2.852cm" svg:height="2.143cm" svg:x="22.714cm" svg:y="8.263cm">
          <draw:text-box>
            <text:p><text:span text:style-name="T5">. . .</text:span></text:p>
          </draw:text-box>
        </draw:frame>
        <draw:frame draw:style-name="gr33" draw:text-style-name="P10" draw:layer="layout" svg:width="2.852cm" svg:height="2.143cm" svg:x="14.713cm" svg:y="8.193cm">
          <draw:text-box>
            <text:p><text:span text:style-name="T5">. . .</text:span></text:p>
          </draw:text-box>
        </draw:frame>
        <draw:frame draw:style-name="gr32" draw:text-style-name="P9" draw:layer="layout" svg:width="3.148cm" svg:height="2.54cm" svg:x="18.873cm" svg:y="11.302cm">
          <draw:text-box>
            <text:p><text:span text:style-name="T4">. . 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2-26T21:39:33.998317027</dc:date>
    <meta:editing-cycles>76</meta:editing-cycles>
    <meta:editing-duration>PT9H20M48S</meta:editing-duration>
    <meta:print-date>2017-04-17T17:26:32.987291272</meta:print-date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