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8d281e" draw:marker-start-width="0.686cm" draw:marker-end-width="0.686cm" draw:fill-color="#ffe994" draw:textarea-horizontal-align="justify" draw:textarea-vertical-align="middle" draw:auto-grow-height="false" fo:min-height="18.063cm" fo:min-width="35.593cm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svg:stroke-color="#729fcf" draw:marker-start-width="0.686cm" draw:marker-end-width="0.686cm" draw:fill-color="#fff5ce" draw:textarea-horizontal-align="justify" draw:textarea-vertical-align="middle" draw:auto-grow-height="false" fo:min-height="13.366cm" fo:min-width="32.266cm" fo:padding-top="0.252cm" fo:padding-bottom="0.252cm" fo:padding-left="0.377cm" fo:padding-right="0.377cm"/>
    </style:style>
    <style:style style:name="gr3" style:family="graphic" style:parent-style-name="standard">
      <style:graphic-properties svg:stroke-width="0.254cm" svg:stroke-color="#ed4c05" draw:marker-start-width="0.686cm" draw:marker-end-width="0.686cm" draw:fill-color="#fff5ce" draw:textarea-horizontal-align="justify" draw:textarea-vertical-align="middle" draw:auto-grow-height="false" fo:min-height="8.861cm" fo:min-width="28.456cm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acb20c" draw:marker-start-width="0.686cm" draw:marker-end-width="0.686cm" draw:fill-color="#fff5ce" draw:textarea-horizontal-align="justify" draw:textarea-vertical-align="middle" draw:auto-grow-height="false" fo:min-height="6.302cm" fo:min-width="16.561cm" fo:padding-top="0.252cm" fo:padding-bottom="0.252cm" fo:padding-left="0.377cm" fo:padding-right="0.3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9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2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4.52cm"/>
      <style:paragraph-properties style:writing-mode="lr-tb"/>
    </style:style>
    <style:style style:name="gr9" style:family="graphic" style:parent-style-name="standard">
      <style:graphic-properties svg:stroke-width="0.254cm" svg:stroke-color="#5eb91e" draw:marker-start-width="0.686cm" draw:marker-end-width="0.686cm" draw:fill="solid" draw:fill-color="#ffffff" draw:opacity="100%" draw:textarea-horizontal-align="justify" draw:textarea-vertical-align="middle" draw:auto-grow-height="false" fo:min-height="4.427cm" fo:min-width="13.316cm" fo:padding-top="0.252cm" fo:padding-bottom="0.252cm" fo:padding-left="0.377cm" fo:padding-right="0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5ce" draw:textarea-horizontal-align="left" draw:auto-grow-height="true" draw:auto-grow-width="true" fo:min-height="0.887cm" fo:min-width="11.9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6cm" fo:min-width="14.868cm"/>
      <style:paragraph-properties style:writing-mode="lr-tb"/>
    </style:style>
    <style:style style:name="gr12" style:family="graphic" style:parent-style-name="objectwithoutfill">
      <style:graphic-properties svg:stroke-width="0.212cm" svg:stroke-color="#706e0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b66c" draw:marker-start-width="0.618cm" draw:marker-end-width="0.618cm" draw:fill="bitmap" draw:fill-color="#ffffff" draw:fill-image-name="_35__20_Percent" draw:textarea-horizontal-align="justify" draw:textarea-vertical-align="middle" draw:auto-grow-height="false" fo:min-height="5.888cm" fo:min-width="4.368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4cm" fo:min-width="0cm"/>
      <style:paragraph-properties style:writing-mode="lr-tb"/>
    </style:style>
    <style:style style:name="gr15" style:family="graphic" style:parent-style-name="standard">
      <style:graphic-properties svg:stroke-width="0.212cm" svg:stroke-color="#ff860d" draw:marker-start-width="0.618cm" draw:marker-end-width="0.618cm" draw:fill="bitmap" draw:fill-color="#ffffff" draw:fill-image-name="_31_0_20_Percent" draw:textarea-horizontal-align="justify" draw:textarea-vertical-align="middle" draw:auto-grow-height="false" fo:min-height="5.888cm" fo:min-width="4.368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853cm"/>
      <style:paragraph-properties style:writing-mode="lr-tb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-color="#fff5c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5b277d" loext:opacity="100%" loext:color-lum-mod="100%" loext:color-lum-off="0%" style:font-name="XB Zar1" fo:font-size="26pt" fo:font-weight="bold" style:font-size-asian="18pt" style:font-size-complex="18pt"/>
    </style:style>
    <style:style style:name="P7" style:family="paragraph">
      <loext:graphic-properties draw:fill="solid" draw:fill-color="#ffffff" draw:opacity="100%"/>
      <style:paragraph-properties fo:text-align="center" style:writing-mode="lr-tb"/>
    </style:style>
    <style:style style:name="P8" style:family="paragraph">
      <loext:graphic-properties draw:fill="none" draw:fill-color="#fff5ce"/>
      <style:paragraph-properties style:writing-mode="lr-tb"/>
      <style:text-properties fo:font-size="20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bitmap" draw:fill-color="#ffffff" draw:fill-image-name="_35__20_Percent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bitmap" draw:fill-color="#ffffff" draw:fill-image-name="_31_0_20_Percent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color="#5b277d" loext:opacity="100%" style:font-name="XB Zar1" fo:font-size="26pt" fo:font-weight="bold" style:font-size-asian="18pt" style:font-size-complex="18pt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6.195cm" svg:height="18.415cm" svg:x="2.091cm" svg:y="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02cm" svg:height="13.87cm" svg:x="3.5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9.21cm" svg:height="9.365cm" svg:x="5.445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7.315cm" svg:height="6.806cm" svg:x="5.968cm" svg:y="11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1.758cm" svg:height="0.962cm" svg:x="7.445cm" svg:y="9.968cm">
          <draw:text-box>
            <text:p><text:span text:style-name="T1">BISOS: (ByStar Internet Services OS)</text:span></text:p>
          </draw:text-box>
        </draw:frame>
        <draw:frame draw:style-name="gr6" draw:text-style-name="P5" draw:layer="layout" svg:width="10.416cm" svg:height="1.038cm" svg:x="7.28cm" svg:y="4.777cm">
          <draw:text-box>
            <text:p><text:span text:style-name="T2">ByStar Autonomous Services</text:span></text:p>
          </draw:text-box>
        </draw:frame>
        <draw:frame draw:style-name="gr7" draw:text-style-name="P5" draw:layer="layout" svg:width="14.764cm" svg:height="1.038cm" svg:x="5.29cm" svg:y="3.24cm">
          <draw:text-box>
            <text:p><text:span text:style-name="T2">The Libre-Halaal ByStar Digital Ecosystem</text:span></text:p>
          </draw:text-box>
        </draw:frame>
        <draw:frame draw:style-name="gr8" draw:text-style-name="P6" draw:layer="layout" svg:width="35.02cm" svg:height="1.644cm" svg:x="2.598cm" svg:y="1.226cm">
          <draw:text-box>
            <text:p><text:span text:style-name="T3">The Libre-Halaal ByStar <text:s/>Digital Ecosystem Containment Hierarchy</text:span></text:p>
          </draw:text-box>
        </draw:frame>
        <draw:custom-shape draw:style-name="gr9" draw:text-style-name="P7" draw:layer="layout" svg:width="14.07cm" svg:height="4.931cm" svg:x="6.33cm" svg:y="12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2.491cm" svg:height="1.137cm" svg:x="7.065cm" svg:y="12.897cm">
          <draw:text-box>
            <text:p><text:span text:style-name="T2"><text:s/></text:span><text:span text:style-name="T2">Debian (Host and Guest) + Python</text:span></text:p>
          </draw:text-box>
        </draw:frame>
        <draw:frame draw:style-name="gr11" draw:text-style-name="P4" draw:layer="layout" svg:width="15.368cm" svg:height="1.546cm" svg:x="5.417cm" svg:y="6.485cm">
          <draw:text-box>
            <text:p><text:span text:style-name="T1">Blee: (BISOS Libre-Halaal Emacs Environment)</text:span></text:p>
          </draw:text-box>
        </draw:frame>
        <draw:line draw:style-name="gr12" draw:text-style-name="P9" draw:layer="layout" svg:x1="2.908cm" svg:y1="4.545cm" svg:x2="37.604cm" svg:y2="4.545cm">
          <text:p/>
        </draw:line>
        <draw:line draw:style-name="gr12" draw:text-style-name="P9" draw:layer="layout" svg:x1="2.905cm" svg:y1="4.48cm" svg:x2="2.905cm" svg:y2="20.685cm">
          <text:p/>
        </draw:line>
        <draw:line draw:style-name="gr12" draw:text-style-name="P9" draw:layer="layout" svg:x1="2.905cm" svg:y1="20.685cm" svg:x2="37.5cm" svg:y2="20.685cm">
          <text:p/>
        </draw:line>
        <draw:custom-shape draw:style-name="gr13" draw:text-style-name="P10" draw:layer="layout" svg:width="5.08cm" svg:height="6.35cm" svg:x="21.955cm" svg:y="3.98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45cm" svg:height="5.894cm" svg:x="22.29cm" svg:y="4.228cm">
          <draw:text-box>
            <text:p><text:span text:style-name="T4">ByStar</text:span></text:p>
            <text:p><text:span text:style-name="T4">Capability</text:span></text:p>
            <text:p><text:span text:style-name="T4">Bundle (BCB):</text:span></text:p>
            <text:p><text:span text:style-name="T5"/></text:p>
            <text:p><text:span text:style-name="T6">Content</text:span></text:p>
            <text:p><text:span text:style-name="T6">Generation &amp;</text:span></text:p>
            <text:p><text:span text:style-name="T6">Autonomous</text:span></text:p>
            <text:p><text:span text:style-name="T6">Publication</text:span></text:p>
            <text:p><text:span text:style-name="T6"/></text:p>
          </draw:text-box>
        </draw:frame>
        <draw:custom-shape draw:style-name="gr15" draw:text-style-name="P12" draw:layer="layout" svg:width="5.08cm" svg:height="6.35cm" svg:x="28.305cm" svg:y="3.9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37.495cm" svg:y1="4.531cm" svg:x2="37.495cm" svg:y2="20.787cm">
          <text:p/>
        </draw:line>
        <draw:frame draw:style-name="gr14" draw:text-style-name="P11" draw:layer="layout" svg:width="5.715cm" svg:height="5.894cm" svg:x="28.305cm" svg:y="4.32cm">
          <draw:text-box>
            <text:p><text:span text:style-name="T4">ByStar</text:span></text:p>
            <text:p><text:span text:style-name="T4">Capability</text:span></text:p>
            <text:p><text:span text:style-name="T4">Bundle (BCB):</text:span></text:p>
            <text:p><text:span text:style-name="T6"/></text:p>
            <text:p><text:span text:style-name="T6">Interpersonal</text:span></text:p>
            <text:p><text:span text:style-name="T6">Communications</text:span></text:p>
            <text:p><text:span text:style-name="T6">(Email,</text:span></text:p>
            <text:p><text:span text:style-name="T7">Audio/Video Chat</text:span><text:span text:style-name="T6">)</text:span></text:p>
            <text:p><text:span text:style-name="T6"/></text:p>
          </draw:text-box>
        </draw:frame>
        <draw:frame draw:style-name="gr16" draw:text-style-name="P13" draw:layer="layout" svg:width="18.353cm" svg:height="1.038cm" svg:x="6.668cm" svg:y="11.488cm">
          <draw:text-box>
            <text:p><text:span text:style-name="T8">Python Command </text:span><text:span text:style-name="T9">Services</text:span><text:span text:style-name="T8"> --- PyCS Framewor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B Zar" svg:font-family="'XB Zar'" style:font-pitch="variable"/>
    <style:font-face style:name="XB Zar1" svg:font-family="'XB Zar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hsen Banan</meta:initial-creator>
    <meta:creation-date>2008-12-11T11:12:16</meta:creation-date>
    <dc:date>2026-06-14T21:37:46.776070166</dc:date>
    <meta:editing-cycles>76</meta:editing-cycles>
    <meta:editing-duration>PT18H27M33S</meta:editing-duration>
    <meta:print-date>2022-11-11T19:39:12.150258840</meta:print-date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