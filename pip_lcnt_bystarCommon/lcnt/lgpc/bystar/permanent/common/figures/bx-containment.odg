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0A1E16DA75ED138.png" manifest:media-type="image/png"/>
  <manifest:file-entry manifest:full-path="Pictures/100000000000000800000008D08546357274616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XB Zar" svg:font-family="'XB Zar'" style:font-pitch="variable"/>
    <style:font-face style:name="XB Zar1" svg:font-family="'XB Zar'" style:font-adornments="Bold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8d281e" draw:marker-start-width="0.686cm" draw:marker-end-width="0.686cm" draw:fill-color="#ffe994" draw:textarea-horizontal-align="justify" draw:textarea-vertical-align="middle" draw:auto-grow-height="false" fo:min-height="18.063cm" fo:min-width="35.593cm" fo:padding-top="0.252cm" fo:padding-bottom="0.252cm" fo:padding-left="0.377cm" fo:padding-right="0.377cm"/>
    </style:style>
    <style:style style:name="gr2" style:family="graphic" style:parent-style-name="standard">
      <style:graphic-properties svg:stroke-width="0.254cm" svg:stroke-color="#729fcf" draw:marker-start-width="0.686cm" draw:marker-end-width="0.686cm" draw:fill-color="#fff5ce" draw:textarea-horizontal-align="justify" draw:textarea-vertical-align="middle" draw:auto-grow-height="false" fo:min-height="13.366cm" fo:min-width="31.065cm" fo:padding-top="0.252cm" fo:padding-bottom="0.252cm" fo:padding-left="0.377cm" fo:padding-right="0.377cm"/>
    </style:style>
    <style:style style:name="gr3" style:family="graphic" style:parent-style-name="standard">
      <style:graphic-properties svg:stroke-width="0.254cm" svg:stroke-color="#ed4c05" draw:marker-start-width="0.686cm" draw:marker-end-width="0.686cm" draw:fill-color="#fff5ce" draw:textarea-horizontal-align="justify" draw:textarea-vertical-align="middle" draw:auto-grow-height="false" fo:min-height="10.457cm" fo:min-width="28.748cm" fo:padding-top="0.252cm" fo:padding-bottom="0.252cm" fo:padding-left="0.377cm" fo:padding-right="0.377cm"/>
    </style:style>
    <style:style style:name="gr4" style:family="graphic" style:parent-style-name="standard">
      <style:graphic-properties svg:stroke-width="0.254cm" svg:stroke-color="#acb20c" draw:marker-start-width="0.686cm" draw:marker-end-width="0.686cm" draw:fill="solid" draw:fill-color="#e8f2a1" loext:fill-use-slide-background="false" draw:textarea-horizontal-align="justify" draw:textarea-vertical-align="middle" draw:auto-grow-height="false" fo:min-height="6.302cm" fo:min-width="17.604cm" fo:padding-top="0.252cm" fo:padding-bottom="0.252cm" fo:padding-left="0.377cm" fo:padding-right="0.37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5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9.91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2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4cm" fo:min-width="34.52cm"/>
      <style:paragraph-properties style:writing-mode="lr-tb"/>
    </style:style>
    <style:style style:name="gr9" style:family="graphic" style:parent-style-name="standard">
      <style:graphic-properties svg:stroke-width="0.254cm" svg:stroke-color="#5eb91e" draw:marker-start-width="0.686cm" draw:marker-end-width="0.686cm" draw:fill="solid" draw:fill-color="#ffffff" draw:opacity="100%" draw:textarea-horizontal-align="justify" draw:textarea-vertical-align="middle" draw:auto-grow-height="false" fo:min-height="2.56cm" fo:min-width="13.316cm" fo:padding-top="0.252cm" fo:padding-bottom="0.252cm" fo:padding-left="0.377cm" fo:padding-right="0.3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5ce" draw:textarea-horizontal-align="left" draw:auto-grow-height="true" draw:auto-grow-width="true" fo:min-height="0.887cm" fo:min-width="11.99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9cm" fo:min-width="14.868cm"/>
      <style:paragraph-properties style:writing-mode="lr-tb"/>
    </style:style>
    <style:style style:name="gr12" style:family="graphic" style:parent-style-name="objectwithoutfill">
      <style:graphic-properties svg:stroke-width="0.212cm" svg:stroke-color="#706e0c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svg:stroke-width="0.212cm" svg:stroke-color="#ffb66c" draw:marker-start-width="0.618cm" draw:marker-end-width="0.618cm" draw:fill="bitmap" draw:fill-color="#ffffff" draw:fill-image-name="_31_0_20_Percent" draw:textarea-horizontal-align="justify" draw:textarea-vertical-align="middle" draw:auto-grow-height="false" fo:min-height="5.888cm" fo:min-width="4.368cm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44cm" fo:min-width="0cm"/>
      <style:paragraph-properties style:writing-mode="lr-tb"/>
    </style:style>
    <style:style style:name="gr15" style:family="graphic" style:parent-style-name="standard">
      <style:graphic-properties svg:stroke-width="0.212cm" svg:stroke-color="#ff860d" draw:marker-start-width="0.618cm" draw:marker-end-width="0.618cm" draw:fill="bitmap" draw:fill-color="#ffffff" draw:fill-image-name="_31_0_20_Percent" draw:textarea-horizontal-align="justify" draw:textarea-vertical-align="middle" draw:auto-grow-height="false" fo:min-height="5.888cm" fo:min-width="4.368cm" fo:padding-top="0.231cm" fo:padding-bottom="0.231cm" fo:padding-left="0.356cm" fo:padding-right="0.3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338cm"/>
      <style:paragraph-properties style:writing-mode="lr-tb"/>
    </style:style>
    <style:style style:name="P1" style:family="paragraph">
      <loext:graphic-properties draw:fill-color="#ffe994"/>
      <style:paragraph-properties fo:text-align="center"/>
    </style:style>
    <style:style style:name="P2" style:family="paragraph">
      <loext:graphic-properties draw:fill-color="#fff5ce"/>
      <style:paragraph-properties fo:text-align="center"/>
    </style:style>
    <style:style style:name="P3" style:family="paragraph">
      <loext:graphic-properties draw:fill="solid" draw:fill-color="#e8f2a1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20pt" fo:font-weight="bold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color="#5b277d" loext:opacity="100%" loext:color-lum-mod="100%" loext:color-lum-off="0%" style:font-name="XB Zar1" fo:font-size="26pt" fo:font-weight="bold" style:font-size-asian="18pt" style:font-size-complex="18pt"/>
    </style:style>
    <style:style style:name="P7" style:family="paragraph">
      <loext:graphic-properties draw:fill="solid" draw:fill-color="#ffffff" draw:opacity="100%"/>
      <style:paragraph-properties fo:text-align="center" style:writing-mode="lr-tb"/>
    </style:style>
    <style:style style:name="P8" style:family="paragraph">
      <loext:graphic-properties draw:fill="none" draw:fill-color="#fff5ce"/>
      <style:paragraph-properties style:writing-mode="lr-tb"/>
      <style:text-properties fo:font-size="20pt" fo:font-weight="bold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bitmap" draw:fill-color="#ffffff" draw:fill-image-name="_31_0_20_Percent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6pt"/>
    </style:style>
    <style:style style:name="P1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20pt" fo:font-weight="bold" style:font-size-asian="18pt" style:font-size-complex="18pt"/>
    </style:style>
    <style:style style:name="T3" style:family="text">
      <style:text-properties fo:color="#5b277d" loext:opacity="100%" style:font-name="XB Zar1" fo:font-size="26pt" fo:font-weight="bold" style:font-size-asian="18pt" style:font-size-complex="18pt"/>
    </style:style>
    <style:style style:name="T4" style:family="text">
      <style:text-properties fo:font-size="16pt" fo:font-weight="bold" style:font-size-asian="18pt" style:font-weight-asian="bold" style:font-size-complex="18pt" style:font-weight-complex="bold"/>
    </style:style>
    <style:style style:name="T5" style:family="text">
      <style:text-properties fo:font-size="16pt"/>
    </style:style>
    <style:style style:name="T6" style:family="text">
      <style:text-properties fo:font-size="16pt" fo:font-weight="bold" style:font-weight-asian="bold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6.195cm" svg:height="18.415cm" svg:x="2.091cm" svg:y="2.9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1.819cm" svg:height="13.87cm" svg:x="3.882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9.502cm" svg:height="10.961cm" svg:x="5.119cm" svg:y="8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8.358cm" svg:height="6.806cm" svg:x="6.425cm" svg:y="11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1.758cm" svg:height="0.962cm" svg:x="7.445cm" svg:y="9.068cm">
          <draw:text-box>
            <text:p><text:span text:style-name="T1">BISOS: (ByStar Internet Services OS)</text:span></text:p>
          </draw:text-box>
        </draw:frame>
        <draw:frame draw:style-name="gr6" draw:text-style-name="P5" draw:layer="layout" svg:width="10.416cm" svg:height="1.038cm" svg:x="7.28cm" svg:y="4.777cm">
          <draw:text-box>
            <text:p><text:span text:style-name="T2">ByStar Autonomous Services</text:span></text:p>
          </draw:text-box>
        </draw:frame>
        <draw:frame draw:style-name="gr7" draw:text-style-name="P5" draw:layer="layout" svg:width="14.764cm" svg:height="1.038cm" svg:x="5.29cm" svg:y="3.24cm">
          <draw:text-box>
            <text:p><text:span text:style-name="T2">The Libre-Halaal ByStar Digital Ecosystem</text:span></text:p>
          </draw:text-box>
        </draw:frame>
        <draw:frame draw:style-name="gr8" draw:text-style-name="P6" draw:layer="layout" svg:width="35.02cm" svg:height="1.644cm" svg:x="2.598cm" svg:y="1.226cm">
          <draw:text-box>
            <text:p><text:span text:style-name="T3">The Libre-Halaal ByStar <text:s/>Digital Ecosystem Containment Hierarchy</text:span></text:p>
          </draw:text-box>
        </draw:frame>
        <draw:custom-shape draw:style-name="gr9" draw:text-style-name="P7" draw:layer="layout" svg:width="14.07cm" svg:height="3.064cm" svg:x="8.13cm" svg:y="14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12.491cm" svg:height="1.137cm" svg:x="8.565cm" svg:y="15.497cm">
          <draw:text-box>
            <text:p><text:span text:style-name="T2"><text:s/></text:span><text:span text:style-name="T2">Debian (Host and Guest) + Python</text:span></text:p>
          </draw:text-box>
        </draw:frame>
        <draw:frame draw:style-name="gr11" draw:text-style-name="P4" draw:layer="layout" svg:width="15.368cm" svg:height="1.109cm" svg:x="5.417cm" svg:y="6.685cm">
          <draw:text-box>
            <text:p><text:span text:style-name="T1">Blee: (BISOS Libre-Halaal Emacs Environment)</text:span></text:p>
          </draw:text-box>
        </draw:frame>
        <draw:line draw:style-name="gr12" draw:text-style-name="P9" draw:layer="layout" svg:x1="2.908cm" svg:y1="4.545cm" svg:x2="37.041cm" svg:y2="4.536cm">
          <text:p/>
        </draw:line>
        <draw:line draw:style-name="gr12" draw:text-style-name="P9" draw:layer="layout" svg:x1="2.905cm" svg:y1="4.48cm" svg:x2="2.905cm" svg:y2="20.685cm">
          <text:p/>
        </draw:line>
        <draw:line draw:style-name="gr12" draw:text-style-name="P9" draw:layer="layout" svg:x1="2.905cm" svg:y1="20.685cm" svg:x2="37.076cm" svg:y2="20.686cm">
          <text:p/>
        </draw:line>
        <draw:custom-shape draw:style-name="gr13" draw:text-style-name="P10" draw:layer="layout" svg:width="5.08cm" svg:height="6.35cm" svg:x="21.955cm" svg:y="3.98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4.445cm" svg:height="5.894cm" svg:x="22.29cm" svg:y="4.228cm">
          <draw:text-box>
            <text:p><text:span text:style-name="T4">ByStar</text:span></text:p>
            <text:p><text:span text:style-name="T4">Capability</text:span></text:p>
            <text:p><text:span text:style-name="T4">Bundle (BCB):</text:span></text:p>
            <text:p><text:span text:style-name="T5"/></text:p>
            <text:p><text:span text:style-name="T6">Content</text:span></text:p>
            <text:p><text:span text:style-name="T6">Generation &amp;</text:span></text:p>
            <text:p><text:span text:style-name="T6">Autonomous</text:span></text:p>
            <text:p><text:span text:style-name="T6">Publication</text:span></text:p>
            <text:p><text:span text:style-name="T6"/></text:p>
          </draw:text-box>
        </draw:frame>
        <draw:custom-shape draw:style-name="gr15" draw:text-style-name="P10" draw:layer="layout" svg:width="5.08cm" svg:height="6.35cm" svg:x="28.305cm" svg:y="3.98cm">
          <text:p/>
          <draw:enhanced-geometry svg:viewBox="0 0 21600 21600" draw:type="rectangle" draw:enhanced-path="M 0 0 L 21600 0 21600 21600 0 21600 0 0 Z N"/>
        </draw:custom-shape>
        <draw:line draw:style-name="gr12" draw:text-style-name="P9" draw:layer="layout" svg:x1="37.095cm" svg:y1="4.429cm" svg:x2="37.095cm" svg:y2="20.787cm">
          <text:p/>
        </draw:line>
        <draw:frame draw:style-name="gr14" draw:text-style-name="P11" draw:layer="layout" svg:width="5.715cm" svg:height="5.894cm" svg:x="28.305cm" svg:y="4.32cm">
          <draw:text-box>
            <text:p><text:span text:style-name="T4">ByStar</text:span></text:p>
            <text:p><text:span text:style-name="T4">Capability</text:span></text:p>
            <text:p><text:span text:style-name="T4">Bundle (BCB):</text:span></text:p>
            <text:p><text:span text:style-name="T6"/></text:p>
            <text:p><text:span text:style-name="T6">Interpersonal</text:span></text:p>
            <text:p><text:span text:style-name="T6">Communications</text:span></text:p>
            <text:p><text:span text:style-name="T6">(Email,</text:span></text:p>
            <text:p><text:span text:style-name="T7">Audio/Video Chat</text:span><text:span text:style-name="T6">)</text:span></text:p>
            <text:p><text:span text:style-name="T6"/></text:p>
          </draw:text-box>
        </draw:frame>
        <draw:frame draw:style-name="gr16" draw:text-style-name="P12" draw:layer="layout" svg:width="15.838cm" svg:height="1.749cm" svg:x="7.968cm" svg:y="11.988cm">
          <draw:text-box>
            <text:p><text:span text:style-name="T8">Python Command </text:span><text:span text:style-name="T9">Services</text:span><text:span text:style-name="T8"> </text:span></text:p>
            <text:p><text:span text:style-name="T8"><text:s/></text:span><text:span text:style-name="T8">PyCS Framework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XB Zar" svg:font-family="'XB Zar'" style:font-pitch="variable"/>
    <style:font-face style:name="XB Zar1" svg:font-family="'XB Zar'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Blue_20_45_20_Degrees" draw:display-name="Blue 45 Degrees" draw:style="single" draw:color="#2a6099" draw:distance="0.203cm" draw:rotation="450"/>
    <draw:hatch draw:name="Green_20_30_20_Degrees" draw:display-name="Green 30 Degrees" draw:style="single" draw:color="#00a933" draw:distance="0.203cm" draw:rotation="300"/>
    <draw:hatch draw:name="Green_20_60_20_Degrees" draw:display-name="Green 60 Degrees" draw:style="single" draw:color="#00a933" draw:distance="0.203cm" draw:rotation="600"/>
    <draw:fill-image draw:name="_31_0_20_Percent" draw:display-name="10 Percent" xlink:href="Pictures/100000000000000800000008D085463572746166.png" xlink:type="simple" xlink:show="embed" xlink:actuate="onLoad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Mohsen Banan</meta:initial-creator>
    <meta:creation-date>2008-12-11T11:12:16</meta:creation-date>
    <dc:date>2026-06-15T22:20:08.244178939</dc:date>
    <meta:editing-cycles>79</meta:editing-cycles>
    <meta:editing-duration>PT18H38M53S</meta:editing-duration>
    <meta:print-date>2022-11-11T19:39:12.150258840</meta:print-date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