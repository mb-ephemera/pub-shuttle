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10d0c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10.93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4.58cm"/>
    </style:style>
    <style:style style:name="gr4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10.93cm"/>
      <style:paragraph-properties style:writing-mode="lr-tb"/>
    </style:style>
    <style:style style:name="gr5" style:family="graphic" style:parent-style-name="standard">
      <style:graphic-properties svg:stroke-color="#3faf46" draw:fill-color="#3faf46" draw:textarea-horizontal-align="justify" draw:textarea-vertical-align="middle" draw:auto-grow-height="false" fo:min-height="0.893cm" fo:min-width="4.583cm"/>
    </style:style>
    <style:style style:name="gr6" style:family="graphic" style:parent-style-name="standard">
      <style:graphic-properties svg:stroke-color="#3faf46" draw:fill-color="#b2b2b2" draw:textarea-horizontal-align="justify" draw:textarea-vertical-align="middle" draw:auto-grow-height="false" fo:min-height="1.909cm" fo:min-width="9.6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1cm"/>
      <style:paragraph-properties style:writing-mode="lr-tb"/>
    </style:style>
    <style:style style:name="gr8" style:family="graphic" style:parent-style-name="standard">
      <style:graphic-properties svg:stroke-color="#3faf46" draw:fill-color="#b2b2b2" draw:textarea-horizontal-align="justify" draw:textarea-vertical-align="middle" draw:auto-grow-height="false" fo:min-height="1.901cm" fo:min-width="9.6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  <style:paragraph-properties style:writing-mode="lr-tb"/>
    </style:style>
    <style:style style:name="gr10" style:family="graphic" style:parent-style-name="standard">
      <style:graphic-properties svg:stroke-color="#3faf46" draw:fill-color="#b2b2b2" draw:textarea-horizontal-align="justify" draw:textarea-vertical-align="middle" draw:auto-grow-height="false" fo:min-height="1.02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6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2.6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3.2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4.1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2b2b2" draw:textarea-horizontal-align="left" draw:auto-grow-height="true" draw:auto-grow-width="true" fo:min-height="0.712cm" fo:min-width="3.9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9cm"/>
      <style:paragraph-properties style:writing-mode="lr-tb"/>
    </style:style>
    <style:style style:name="gr19" style:family="graphic" style:parent-style-name="standard">
      <style:graphic-properties svg:stroke-color="#3faf46" draw:fill-color="#cccccc" draw:textarea-horizontal-align="justify" draw:textarea-vertical-align="middle" draw:auto-grow-height="false" fo:min-height="0.948cm" fo:min-width="3.5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21" style:family="graphic" style:parent-style-name="standard">
      <style:graphic-properties svg:stroke-color="#3faf46" draw:fill-color="#cccccc" draw:textarea-horizontal-align="justify" draw:textarea-vertical-align="middle" draw:auto-grow-height="false" fo:min-height="0.739cm" fo:min-width="1.836cm"/>
    </style:style>
    <style:style style:name="gr22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2.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3faf46" draw:fill-color="#cccccc" draw:textarea-horizontal-align="justify" draw:textarea-vertical-align="middle" draw:auto-grow-height="false" fo:min-height="0.919cm" fo:min-width="2.016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svg:stroke-color="#3faf46" draw:fill-color="#3faf46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1cm" fo:min-width="3.876cm"/>
      <style:paragraph-properties style:writing-mode="lr-tb"/>
    </style:style>
    <style:style style:name="gr30" style:family="graphic" style:parent-style-name="standard">
      <style:graphic-properties draw:fill-color="#005aff" draw:textarea-horizontal-align="justify" draw:textarea-vertical-align="middle" draw:auto-grow-height="false" fo:min-height="0.648cm" fo:min-width="3.1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32" style:family="graphic" style:parent-style-name="standard">
      <style:graphic-properties draw:fill-color="#005aff" draw:textarea-horizontal-align="justify" draw:textarea-vertical-align="middle" draw:auto-grow-height="false" fo:min-height="0.56cm" fo:min-width="3.183cm"/>
    </style:style>
    <style:style style:name="gr33" style:family="graphic" style:parent-style-name="standard">
      <style:graphic-properties draw:stroke="none" svg:stroke-color="#000000" draw:fill="none" draw:fill-color="#005a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>
      <style:graphic-properties draw:fill-color="#e20074" draw:textarea-horizontal-align="justify" draw:textarea-vertical-align="middle" draw:auto-grow-height="false" fo:min-height="0.56cm" fo:min-width="3.4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5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8" style:family="graphic" style:parent-style-name="standard">
      <style:graphic-properties svg:stroke-color="#3faf46" draw:fill-color="#b4c7dc" draw:textarea-horizontal-align="justify" draw:textarea-vertical-align="middle" draw:auto-grow-height="false" fo:min-height="1.668cm" fo:min-width="3.63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55cm"/>
      <style:paragraph-properties style:writing-mode="lr-tb"/>
    </style:style>
    <style:style style:name="gr40" style:family="graphic" style:parent-style-name="standard">
      <style:graphic-properties svg:stroke-color="#3faf46" draw:fill-color="#b4c7dc" draw:textarea-horizontal-align="justify" draw:textarea-vertical-align="middle" draw:auto-grow-height="false" fo:min-height="0.919cm" fo:min-width="2.861cm"/>
      <style:paragraph-properties style:writing-mode="lr-tb"/>
    </style:style>
    <style:style style:name="gr41" style:family="graphic" style:parent-style-name="standard">
      <style:graphic-properties svg:stroke-color="#333333" draw:fill-color="#e20074" draw:textarea-horizontal-align="justify" draw:textarea-vertical-align="middle" draw:auto-grow-height="false" fo:min-height="0.311cm" fo:min-width="2.877cm"/>
    </style:style>
    <style:style style:name="gr42" style:family="graphic" style:parent-style-name="standard">
      <style:graphic-properties svg:stroke-color="#3faf46" draw:fill-color="#3faf46" draw:textarea-horizontal-align="justify" draw:textarea-vertical-align="middle" draw:auto-grow-height="false" fo:min-height="0.358cm" fo:min-width="2.424cm"/>
    </style:style>
    <style:style style:name="gr43" style:family="graphic" style:parent-style-name="standard">
      <style:graphic-properties svg:stroke-color="#3faf46" draw:fill-color="#3faf46" draw:textarea-horizontal-align="justify" draw:textarea-vertical-align="middle" draw:auto-grow-height="false" fo:min-height="0.631cm" fo:min-width="3.178cm"/>
    </style:style>
    <style:style style:name="gr44" style:family="graphic" style:parent-style-name="standard">
      <style:graphic-properties draw:stroke="none" svg:stroke-color="#000000" draw:fill="none" draw:fill-color="#3faf46" draw:textarea-horizontal-align="left" draw:auto-grow-height="true" draw:auto-grow-width="true" fo:min-height="0.712cm" fo:min-width="3.056cm"/>
      <style:paragraph-properties style:writing-mode="lr-tb"/>
    </style:style>
    <style:style style:name="gr45" style:family="graphic" style:parent-style-name="standard">
      <style:graphic-properties svg:stroke-color="#3faf46" draw:fill-color="#3faf46" draw:textarea-horizontal-align="justify" draw:textarea-vertical-align="middle" draw:auto-grow-height="false" fo:min-height="0.293cm" fo:min-width="2.62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8cm" fo:min-width="2.738cm"/>
      <style:paragraph-properties style:writing-mode="lr-tb"/>
    </style:style>
    <style:style style:name="gr47" style:family="graphic" style:parent-style-name="standard">
      <style:graphic-properties svg:stroke-color="#333333" draw:fill-color="#e20074" draw:textarea-horizontal-align="justify" draw:textarea-vertical-align="middle" draw:auto-grow-height="false" fo:min-height="1.241cm" fo:min-width="4.166cm"/>
    </style:style>
    <style:style style:name="gr48" style:family="graphic" style:parent-style-name="standard">
      <style:graphic-properties svg:stroke-color="#333333" draw:fill-color="#e20074" draw:textarea-horizontal-align="justify" draw:textarea-vertical-align="middle" draw:auto-grow-height="false" fo:min-height="1.241cm" fo:min-width="3.7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8cm"/>
      <style:paragraph-properties style:writing-mode="lr-tb"/>
    </style:style>
    <style:style style:name="gr51" style:family="graphic" style:parent-style-name="standard">
      <style:graphic-properties draw:fill-color="#3faf46" draw:textarea-horizontal-align="justify" draw:textarea-vertical-align="middle" draw:auto-grow-height="false" fo:min-height="1.011cm" fo:min-width="2.7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06cm"/>
      <style:paragraph-properties style:writing-mode="lr-tb"/>
    </style:style>
    <style:style style:name="gr53" style:family="graphic" style:parent-style-name="standard">
      <style:graphic-properties draw:fill-color="#3faf46" draw:textarea-horizontal-align="justify" draw:textarea-vertical-align="middle" draw:auto-grow-height="false" fo:min-height="0.896cm" fo:min-width="2.932cm"/>
    </style:style>
    <style:style style:name="gr54" style:family="graphic" style:parent-style-name="standard">
      <style:graphic-properties svg:stroke-color="#333333" draw:fill-color="#3faf46" draw:textarea-horizontal-align="justify" draw:textarea-vertical-align="middle" draw:auto-grow-height="false" fo:min-height="1.011cm" fo:min-width="2.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1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3faf46"/>
      <style:paragraph-properties fo:text-align="center" style:writing-mode="lr-tb"/>
      <style:text-properties fo:font-size="18p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3faf46"/>
      <style:paragraph-properties style:writing-mode="lr-tb"/>
      <style:text-properties fo:font-size="18pt"/>
    </style:style>
    <style:style style:name="P8" style:family="paragraph">
      <loext:graphic-properties draw:fill="none" draw:fill-color="#b2b2b2"/>
      <style:paragraph-properties style:writing-mode="lr-tb"/>
      <style:text-properties fo:font-size="18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3faf46"/>
      <style:paragraph-properties fo:text-align="center" style:writing-mode="lr-tb"/>
    </style:style>
    <style:style style:name="P12" style:family="paragraph">
      <loext:graphic-properties draw:fill-color="#005a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4" style:family="paragraph">
      <loext:graphic-properties draw:fill="none" draw:fill-color="#005a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5" style:family="paragraph">
      <loext:graphic-properties draw:fill-color="#e20074"/>
      <style:paragraph-properties fo:text-align="center"/>
    </style:style>
    <style:style style:name="P16" style:family="paragraph">
      <loext:graphic-properties draw:fill-color="#b4c7dc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style:text-properties fo:color="#ffffff" loext:opacity="100%" fo:font-weight="bold"/>
    </style:style>
    <style:style style:name="P21" style:family="paragraph">
      <loext:graphic-properties draw:fill="none" draw:fill-color="#3faf46"/>
      <style:paragraph-properties style:writing-mode="lr-tb"/>
      <style:text-properties fo:color="#ffffff" loext:opacity="100%" fo:font-size="18pt" fo:font-weight="bold"/>
    </style:style>
    <style:style style:name="P22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T1" style:family="text">
      <style:text-properties fo:font-size="18pt"/>
    </style:style>
    <style:style style:name="T2" style:family="text">
      <style:text-properties fo:color="#ffffff" loext:opacity="100%" fo:font-size="18pt" fo:font-weight="bold" style:font-weight-asian="bold" style:font-weight-complex="bold"/>
    </style:style>
    <style:style style:name="T3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81cm" svg:y1="1cm" svg:x2="14.335cm" svg:y2="7.35cm">
          <text:p/>
        </draw:line>
        <draw:line draw:style-name="gr1" draw:text-style-name="P1" draw:layer="layout" svg:x1="34.02cm" svg:y1="1.127cm" svg:x2="27.035cm" svg:y2="7.477cm">
          <text:p/>
        </draw:line>
        <draw:line draw:style-name="gr1" draw:text-style-name="P1" draw:layer="layout" svg:x1="14.335cm" svg:y1="7.35cm" svg:x2="14.335cm" svg:y2="14.335cm">
          <text:p/>
        </draw:line>
        <draw:line draw:style-name="gr1" draw:text-style-name="P1" draw:layer="layout" svg:x1="27.035cm" svg:y1="7.45cm" svg:x2="27.035cm" svg:y2="14.462cm">
          <text:p/>
        </draw:line>
        <draw:line draw:style-name="gr1" draw:text-style-name="P1" draw:layer="layout" svg:x1="14.335cm" svg:y1="14.335cm" svg:x2="4.683cm" svg:y2="21.32cm">
          <text:p/>
        </draw:line>
        <draw:line draw:style-name="gr1" draw:text-style-name="P1" draw:layer="layout" svg:x1="27.035cm" svg:y1="14.335cm" svg:x2="35.29cm" svg:y2="21.32cm">
          <text:p/>
        </draw:line>
        <draw:custom-shape draw:style-name="gr2" draw:text-style-name="P2" draw:layer="layout" svg:width="11.43cm" svg:height="1.143cm" svg:x="14.9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143cm" svg:x="21.32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43cm" svg:height="1.143cm" svg:x="14.97cm" svg:y="10.071cm">
          <text:p text:style-name="P3"><text:span text:style-name="T1">BISOS -- CSXU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143cm" svg:x="15.016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3cm" svg:height="1.143cm" svg:x="14.97cm" svg:y="12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3cm" svg:height="2.159cm" svg:x="3.667cm" svg:y="10.14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9.271cm" svg:height="0.962cm" svg:x="4.102cm" svg:y="11.033cm">
          <draw:text-box>
            <text:p><text:span text:style-name="T1">Command Line Interface (CLI)</text:span></text:p>
          </draw:text-box>
        </draw:frame>
        <draw:custom-shape draw:style-name="gr8" draw:text-style-name="P5" draw:layer="layout" svg:width="10.163cm" svg:height="2.151cm" svg:x="27.667cm" svg:y="10.14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028cm" svg:height="0.962cm" svg:x="28.178cm" svg:y="11.033cm">
          <draw:text-box>
            <text:p><text:span text:style-name="T1">Command Line Interface (CLI)</text:span></text:p>
          </draw:text-box>
        </draw:frame>
        <draw:custom-shape draw:style-name="gr10" draw:text-style-name="P5" draw:layer="layout" svg:width="3.683cm" svg:height="1.27cm" svg:x="9.89cm" svg:y="8.43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106cm" svg:height="1.27cm" svg:x="10.156cm" svg:y="8.493cm">
          <draw:text-box>
            <text:p><text:span text:style-name="T1">compgen</text:span></text:p>
          </draw:text-box>
        </draw:frame>
        <draw:custom-shape draw:style-name="gr10" draw:text-style-name="P5" draw:layer="layout" svg:width="3.683cm" svg:height="1.27cm" svg:x="27.85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3.106cm" svg:height="1.143cm" svg:x="28.101cm" svg:y="8.493cm">
          <draw:text-box>
            <text:p><text:span text:style-name="T1">compgen</text:span></text:p>
          </draw:text-box>
        </draw:frame>
        <draw:frame draw:style-name="gr13" draw:text-style-name="P6" draw:layer="layout" svg:width="3.249cm" svg:height="0.962cm" svg:x="18.833cm" svg:y="8.801cm">
          <draw:text-box>
            <text:p><text:span text:style-name="T1">csPlayers</text:span></text:p>
          </draw:text-box>
        </draw:frame>
        <draw:frame draw:style-name="gr14" draw:text-style-name="P6" draw:layer="layout" svg:width="5.506cm" svg:height="0.962cm" svg:x="18.145cm" svg:y="11.395cm">
          <draw:text-box>
            <text:p><text:span text:style-name="T1">PyCS-Framework</text:span></text:p>
          </draw:text-box>
        </draw:frame>
        <draw:frame draw:style-name="gr15" draw:text-style-name="P7" draw:layer="layout" svg:width="3.741cm" svg:height="0.962cm" svg:x="15.493cm" svg:y="12.865cm">
          <draw:text-box>
            <text:p><text:span text:style-name="T1">Commands</text:span></text:p>
          </draw:text-box>
        </draw:frame>
        <draw:frame draw:style-name="gr16" draw:text-style-name="P7" draw:layer="layout" svg:width="4.663cm" svg:height="0.962cm" svg:x="21.483cm" svg:y="12.838cm">
          <draw:text-box>
            <text:p><text:span text:style-name="T1">Services <text:s/>(RO)</text:span></text:p>
          </draw:text-box>
        </draw:frame>
        <draw:frame draw:style-name="gr17" draw:text-style-name="P8" draw:layer="layout" svg:width="4.414cm" svg:height="0.962cm" svg:x="4.175cm" svg:y="10.325cm">
          <draw:text-box>
            <text:p><text:span text:style-name="T1">Eg soncli.mcs</text:span></text:p>
          </draw:text-box>
        </draw:frame>
        <draw:frame draw:style-name="gr18" draw:text-style-name="P6" draw:layer="layout" svg:width="8.939cm" svg:height="0.962cm" svg:x="28.185cm" svg:y="10.217cm">
          <draw:text-box>
            <text:p><text:span text:style-name="T1"><text:s text:c="28"/></text:span><text:span text:style-name="T1">Eg facter.ics</text:span></text:p>
          </draw:text-box>
        </draw:frame>
        <draw:custom-shape draw:style-name="gr19" draw:text-style-name="P9" draw:layer="layout" svg:width="5.715cm" svg:height="1.694cm" svg:x="24.61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5.713cm" svg:height="0.962cm" svg:x="24.817cm" svg:y="17.583cm">
          <draw:text-box>
            <text:p><text:span text:style-name="T1">Debian Platforms</text:span></text:p>
          </draw:text-box>
        </draw:frame>
        <draw:custom-shape draw:style-name="gr21" draw:text-style-name="P9" draw:layer="layout" svg:width="3.302cm" svg:height="1.397cm" svg:x="25.16cm" svg:y="19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2.72cm" svg:height="0.962cm" svg:x="25.61cm" svg:y="20.053cm">
          <draw:text-box>
            <text:p><text:span text:style-name="T1">Storage</text:span></text:p>
          </draw:text-box>
        </draw:frame>
        <draw:custom-shape draw:style-name="gr23" draw:text-style-name="P10" draw:layer="layout" svg:width="0.005cm" svg:height="0.043cm" svg:x="29.189cm" svg:y="21.2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556cm" svg:height="1.651cm" svg:x="28.813cm" svg:y="1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3.374cm" svg:height="0.962cm" svg:x="29.049cm" svg:y="19.769cm">
          <draw:text-box>
            <text:p><text:span text:style-name="T1">Networks</text:span></text:p>
          </draw:text-box>
        </draw:frame>
        <draw:polygon draw:style-name="gr26" draw:text-style-name="P11" draw:layer="layout" svg:width="6.73cm" svg:height="2.92cm" svg:x="12.049cm" svg:y="5.318cm" svg:viewBox="0 0 6731 2921" draw:points="0,0 6731,0 6731,2921 2775,2921 2794,1905">
          <text:p/>
        </draw:polygon>
        <draw:frame draw:style-name="gr27" draw:text-style-name="P6" draw:layer="layout" svg:width="4.867cm" svg:height="0.962cm" svg:x="13.551cm" svg:y="5.499cm">
          <draw:text-box>
            <text:p><text:span text:style-name="T1"><text:s text:c="3"/></text:span><text:span text:style-name="T1">Web-UI</text:span></text:p>
          </draw:text-box>
        </draw:frame>
        <draw:frame draw:style-name="gr28" draw:text-style-name="P6" draw:layer="layout" svg:width="4.826cm" svg:height="1.143cm" svg:x="14.589cm" svg:y="6.207cm">
          <draw:text-box>
            <text:p><text:span text:style-name="T1"><text:s/></text:span><text:span text:style-name="T1">csPlayer <text:s/>&amp; <text:s text:c="3"/></text:span></text:p>
          </draw:text-box>
        </draw:frame>
        <draw:polygon draw:style-name="gr26" draw:text-style-name="P2" draw:layer="layout" svg:width="6.349cm" svg:height="2.92cm" svg:x="22.59cm" svg:y="5.318cm" svg:viewBox="0 0 6350 2921" draw:points="4064,2921 0,2921 0,0 6350,0 4064,2032">
          <text:p/>
        </draw:polygon>
        <draw:frame draw:style-name="gr29" draw:text-style-name="P6" draw:layer="layout" svg:width="4.376cm" svg:height="1.121cm" svg:x="22.874cm" svg:y="5.445cm">
          <draw:text-box>
            <text:p><text:span text:style-name="T1">Blee </text:span></text:p>
          </draw:text-box>
        </draw:frame>
        <draw:custom-shape draw:style-name="gr30" draw:text-style-name="P12" draw:layer="layout" svg:width="5.207cm" svg:height="1.27cm" svg:x="11.865cm" svg:y="1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3.393cm" svg:height="0.962cm" svg:x="12.635cm" svg:y="16.205cm">
          <draw:text-box>
            <text:p><text:span text:style-name="T2">SON SDK</text:span></text:p>
          </draw:text-box>
        </draw:frame>
        <draw:custom-shape draw:style-name="gr32" draw:text-style-name="P12" draw:layer="layout" svg:width="5.207cm" svg:height="1.144cm" svg:x="10.106cm" svg:y="17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5.138cm" svg:height="0.962cm" svg:x="10.668cm" svg:y="17.702cm">
          <draw:text-box>
            <text:p><text:span text:style-name="T2">SON Engine</text:span></text:p>
          </draw:text-box>
        </draw:frame>
        <draw:custom-shape draw:style-name="gr34" draw:text-style-name="P15" draw:layer="layout" svg:width="5.588cm" svg:height="1.144cm" draw:transform="skewX (0.00436332312998582) rotate (0.00436332312998582) translate (8.201cm 19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5.588cm" svg:height="1.144cm" draw:transform="skewX (0.00436332312998582) rotate (0.00436332312998582) translate (6.015cm 20.4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2.195cm" svg:height="0.962cm" svg:x="10.012cm" svg:y="19.153cm">
          <draw:text-box>
            <text:p><text:span text:style-name="T2">OSSs</text:span></text:p>
          </draw:text-box>
        </draw:frame>
        <draw:frame draw:style-name="gr36" draw:text-style-name="P13" draw:layer="layout" svg:width="3.004cm" svg:height="1.597cm" svg:x="7.083cm" svg:y="20.504cm">
          <draw:text-box>
            <text:p><text:span text:style-name="T2">Nodes-s</text:span></text:p>
          </draw:text-box>
        </draw:frame>
        <draw:frame draw:style-name="gr37" draw:text-style-name="P6" draw:layer="layout" svg:width="4.953cm" svg:height="1.27cm" svg:x="14.462cm" svg:y="7.223cm">
          <draw:text-box>
            <text:p><text:span text:style-name="T1"><text:s/></text:span><text:span text:style-name="T1">modulePlayer <text:s text:c="2"/></text:span></text:p>
          </draw:text-box>
        </draw:frame>
        <draw:frame draw:style-name="gr28" draw:text-style-name="P6" draw:layer="layout" svg:width="4.826cm" svg:height="1.143cm" svg:x="22.463cm" svg:y="6.334cm">
          <draw:text-box>
            <text:p><text:span text:style-name="T1"><text:s/></text:span><text:span text:style-name="T1">csPlayer <text:s/>&amp; <text:s text:c="3"/></text:span></text:p>
          </draw:text-box>
        </draw:frame>
        <draw:frame draw:style-name="gr37" draw:text-style-name="P6" draw:layer="layout" svg:width="4.953cm" svg:height="1.27cm" svg:x="22.209cm" svg:y="7.223cm">
          <draw:text-box>
            <text:p><text:span text:style-name="T1"><text:s/></text:span><text:span text:style-name="T1">modulePlayer <text:s text:c="2"/></text:span></text:p>
          </draw:text-box>
        </draw:frame>
        <draw:custom-shape draw:style-name="gr38" draw:text-style-name="P16" draw:layer="layout" svg:width="5.842cm" svg:height="2.71cm" svg:x="18.137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855cm" svg:height="2.384cm" svg:x="19.497cm" svg:y="16.848cm">
          <draw:text-box>
            <text:p>NETCONF, </text:p>
            <text:p>SNMP,</text:p>
            <text:p>CMIP</text:p>
          </draw:text-box>
        </draw:frame>
        <draw:custom-shape draw:style-name="gr40" draw:text-style-name="P19" draw:layer="layout" svg:width="4.753cm" svg:height="1.651cm" svg:x="18.436cm" svg:y="19.755cm">
          <text:p text:style-name="P18">Managed</text:p>
          <text:p text:style-name="P18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5.361cm" svg:height="0.889cm" svg:x="13.781cm" svg:y="14.6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4.642cm" svg:height="0.964cm" draw:transform="skewX (-0.264068315826742) rotate (-3.13304054025502) translate (23.782cm 16.183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5.842cm" svg:height="1.397cm" svg:x="24.695cm" svg:y="3.4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4" draw:text-style-name="P21" draw:layer="layout" svg:width="3.783cm" svg:height="0.962cm" svg:x="14.524cm" svg:y="14.581cm">
          <draw:text-box>
            <text:p text:style-name="P20"><text:span text:style-name="T1">soncli.mcs</text:span></text:p>
          </draw:text-box>
        </draw:frame>
        <draw:custom-shape draw:style-name="gr45" draw:text-style-name="P2" draw:layer="layout" svg:width="4.957cm" svg:height="0.861cm" draw:transform="skewX (-0.264242848751941) rotate (-3.13304054025502) translate (28.562cm 16.167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5" draw:text-style-name="P7" draw:layer="layout" svg:width="3.741cm" svg:height="0.962cm" svg:x="24.386cm" svg:y="15.208cm">
          <draw:text-box>
            <text:p><text:span text:style-name="T1">facter.mcs</text:span></text:p>
          </draw:text-box>
        </draw:frame>
        <draw:frame draw:style-name="gr46" draw:text-style-name="P6" draw:layer="layout" svg:width="3.238cm" svg:height="0.978cm" svg:x="25.919cm" svg:y="3.632cm">
          <draw:text-box>
            <text:p><text:span text:style-name="T1">facter.cs</text:span></text:p>
          </draw:text-box>
        </draw:frame>
        <draw:frame draw:style-name="gr15" draw:text-style-name="P7" draw:layer="layout" svg:width="3.741cm" svg:height="0.962cm" svg:x="19.576cm" svg:y="15.17cm">
          <draw:text-box>
            <text:p><text:span text:style-name="T1">cmise.mcs</text:span></text:p>
          </draw:text-box>
        </draw:frame>
        <draw:custom-shape draw:style-name="gr47" draw:text-style-name="P15" draw:layer="layout" svg:width="4.826cm" svg:height="1.651cm" svg:x="8.22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5" draw:layer="layout" svg:width="4.445cm" svg:height="1.651cm" svg:x="10.968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2" draw:layer="layout" svg:width="4.596cm" svg:height="1.673cm" svg:x="8.35cm" svg:y="1.392cm">
          <draw:text-box>
            <text:p><text:span text:style-name="T3">Custom SON </text:span></text:p>
            <text:p><text:span text:style-name="T3"><text:s text:c="3"/></text:span><text:span text:style-name="T3">Module 1</text:span></text:p>
          </draw:text-box>
        </draw:frame>
        <draw:frame draw:style-name="gr50" draw:text-style-name="P22" draw:layer="layout" svg:width="4.418cm" svg:height="1.673cm" svg:x="11.046cm" svg:y="3.264cm">
          <draw:text-box>
            <text:p><text:span text:style-name="T3">Custom SON</text:span></text:p>
            <text:p><text:span text:style-name="T3"><text:s text:c="3"/></text:span><text:span text:style-name="T3">Module N</text:span></text:p>
          </draw:text-box>
        </draw:frame>
        <draw:custom-shape draw:style-name="gr51" draw:text-style-name="P2" draw:layer="layout" svg:width="3.429cm" svg:height="1.397cm" svg:x="14.302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6" draw:layer="layout" svg:width="3.106cm" svg:height="2.384cm" svg:x="14.658cm" svg:y="1.41cm">
          <draw:text-box>
            <text:p><text:span text:style-name="T1">Facter</text:span></text:p>
            <text:p><text:span text:style-name="T1">Module 1</text:span></text:p>
            <text:p><text:span text:style-name="T1"/></text:p>
          </draw:text-box>
        </draw:frame>
        <draw:custom-shape draw:style-name="gr53" draw:text-style-name="P2" draw:layer="layout" svg:width="3.556cm" svg:height="1.27cm" svg:x="18.78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3.556cm" svg:height="1.397cm" svg:x="20.004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3.106cm" svg:height="1.673cm" svg:x="19.161cm" svg:y="1.359cm">
          <draw:text-box>
            <text:p>CMISE</text:p>
            <text:p>Module 1</text:p>
          </draw:text-box>
        </draw:frame>
        <draw:custom-shape draw:style-name="gr54" draw:text-style-name="P2" draw:layer="layout" svg:width="3.556cm" svg:height="1.397cm" svg:x="15.88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6" draw:layer="layout" svg:width="3.211cm" svg:height="2.384cm" svg:x="16.14cm" svg:y="3.315cm">
          <draw:text-box>
            <text:p><text:span text:style-name="T1">Facter</text:span></text:p>
            <text:p><text:span text:style-name="T1">Module N</text:span></text:p>
            <text:p><text:span text:style-name="T1"/></text:p>
          </draw:text-box>
        </draw:frame>
        <draw:frame draw:style-name="gr57" draw:text-style-name="P17" draw:layer="layout" svg:width="3.211cm" svg:height="1.673cm" svg:x="20.285cm" svg:y="3.259cm">
          <draw:text-box>
            <text:p>CMISE</text:p>
            <text:p>Module 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hsen Banan</meta:initial-creator>
    <meta:creation-date>2008-06-01T19:57:48</meta:creation-date>
    <dc:date>2026-03-07T12:56:31.728051637</dc:date>
    <meta:editing-cycles>82</meta:editing-cycles>
    <meta:editing-duration>PT9H58M17S</meta:editing-duration>
    <meta:print-date>2017-04-17T17:26:32.987291272</meta:print-date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