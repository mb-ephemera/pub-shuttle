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f10d0c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081cm" svg:stroke-color="#3faf46" draw:marker-start-width="0.421cm" draw:marker-end-width="0.421cm" draw:fill-color="#3faf46" draw:textarea-horizontal-align="justify" draw:textarea-vertical-align="middle" draw:auto-grow-height="false" fo:min-height="6.147cm" fo:min-width="19.359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e20074" draw:marker-start-width="0.421cm" draw:marker-end-width="0.421cm" draw:fill-color="#e20074" draw:textarea-horizontal-align="justify" draw:textarea-vertical-align="middle" draw:auto-grow-height="false" fo:min-height="1.194cm" fo:min-width="4.5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5aff" draw:marker-start-width="0.421cm" draw:marker-end-width="0.421cm" draw:fill-color="#005aff" draw:textarea-horizontal-align="justify" draw:textarea-vertical-align="middle" draw:auto-grow-height="false" fo:min-height="1.194cm" fo:min-width="4.5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5aff" draw:marker-start-width="0.421cm" draw:marker-end-width="0.421cm" draw:fill-color="#005aff" draw:textarea-horizontal-align="justify" draw:textarea-vertical-align="middle" draw:auto-grow-height="false" fo:min-height="1.377cm" fo:min-width="8.754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5aff" draw:marker-start-width="0.421cm" draw:marker-end-width="0.421cm" draw:fill-color="#005aff" draw:textarea-horizontal-align="justify" draw:textarea-vertical-align="middle" draw:auto-grow-height="false" fo:min-height="1.737cm" fo:min-width="8.22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e20074" draw:marker-start-width="0.421cm" draw:marker-end-width="0.421cm" draw:fill-color="#e20074" draw:textarea-horizontal-align="justify" draw:textarea-vertical-align="middle" draw:auto-grow-height="false" fo:min-height="0.659cm" fo:min-width="2.563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e20074" draw:marker-start-width="0.421cm" draw:marker-end-width="0.421cm" draw:fill-color="#e20074" draw:textarea-horizontal-align="justify" draw:textarea-vertical-align="middle" draw:auto-grow-height="false" fo:min-height="0.659cm" fo:min-width="2.74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e20074" draw:marker-start-width="0.421cm" draw:marker-end-width="0.421cm" draw:fill-color="#e20074" draw:textarea-horizontal-align="justify" draw:textarea-vertical-align="middle" draw:auto-grow-height="false" fo:min-height="0.659cm" fo:min-width="2.543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e20074" draw:marker-start-width="0.421cm" draw:marker-end-width="0.421cm" draw:fill-color="#e20074" draw:textarea-horizontal-align="justify" draw:textarea-vertical-align="middle" draw:auto-grow-height="false" fo:min-height="0.659cm" fo:min-width="2.83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e20074" draw:marker-start-width="0.421cm" draw:marker-end-width="0.421cm" draw:fill-color="#e20074" draw:textarea-horizontal-align="justify" draw:textarea-vertical-align="middle" draw:auto-grow-height="false" fo:min-height="0.659cm" fo:min-width="2.721cm" fo:padding-top="0.165cm" fo:padding-bottom="0.165cm" fo:padding-left="0.29cm" fo:padding-right="0.29cm"/>
    </style:style>
    <style:style style:name="gr12" style:family="graphic" style:parent-style-name="standard">
      <style:graphic-properties svg:stroke-width="0.018cm" svg:stroke-color="#000000" draw:marker-start-width="0.327cm" draw:marker-end-width="0.327cm" draw:fill-color="#005aff" draw:textarea-horizontal-align="justify" draw:textarea-vertical-align="middle" draw:auto-grow-height="false" fo:min-height="0.886cm" fo:min-width="8.353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9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47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6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02cm"/>
      <style:paragraph-properties style:writing-mode="lr-tb"/>
    </style:style>
    <style:style style:name="gr18" style:family="graphic" style:parent-style-name="standard">
      <style:graphic-properties svg:stroke-width="0.018cm" svg:stroke-color="#000000" draw:marker-start-width="0.327cm" draw:marker-end-width="0.327cm" draw:fill-color="#005aff" draw:textarea-horizontal-align="justify" draw:textarea-vertical-align="middle" draw:auto-grow-height="false" fo:min-height="1.013cm" fo:min-width="8.372cm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e20074" draw:textarea-horizontal-align="left" draw:auto-grow-height="true" draw:auto-grow-width="true" fo:min-height="0.712cm" fo:min-width="3.2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72cm"/>
      <style:paragraph-properties style:writing-mode="lr-tb"/>
    </style:style>
    <style:style style:name="gr23" style:family="graphic" style:parent-style-name="objectwithoutfill">
      <style:graphic-properties draw:marker-end="Arrowheads_20_27" draw:marker-end-width="0.3cm" draw:fill="none" draw:textarea-horizontal-align="center" draw:textarea-vertical-align="middle"/>
    </style:style>
    <style:style style:name="gr24" style:family="graphic" style:parent-style-name="objectwithoutfill">
      <style:graphic-properties draw:marker-end="Arrowheads_20_28" draw:marker-end-width="0.3cm" draw:fill="none" draw:textarea-horizontal-align="center" draw:textarea-vertical-align="middle"/>
    </style:style>
    <style:style style:name="gr25" style:family="graphic" style:parent-style-name="objectwithoutfill">
      <style:graphic-properties draw:marker-end="Arrowheads_20_29" draw:marker-end-width="0.3cm" draw:fill="none" draw:textarea-horizontal-align="center" draw:textarea-vertical-align="middle"/>
    </style:style>
    <style:style style:name="gr26" style:family="graphic" style:parent-style-name="objectwithoutfill">
      <style:graphic-properties draw:marker-end="Arrowheads_20_30" draw:marker-end-width="0.3cm" draw:fill="none" draw:textarea-horizontal-align="center" draw:textarea-vertical-align="middle"/>
    </style:style>
    <style:style style:name="gr27" style:family="graphic" style:parent-style-name="objectwithoutfill">
      <style:graphic-properties draw:marker-end="Arrowheads_20_31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draw:marker-end="Arrowheads_20_32" draw:marker-end-width="0.3cm" draw:fill="none" draw:textarea-horizontal-align="center" draw:textarea-vertical-align="middle"/>
    </style:style>
    <style:style style:name="gr29" style:family="graphic" style:parent-style-name="objectwithoutfill">
      <style:graphic-properties draw:marker-end="Arrowheads_20_33" draw:marker-end-width="0.3cm" draw:fill="none" draw:textarea-horizontal-align="center" draw:textarea-vertical-align="middle"/>
    </style:style>
    <style:style style:name="gr30" style:family="graphic" style:parent-style-name="objectwithoutfill">
      <style:graphic-properties draw:marker-end="Arrowheads_20_34" draw:marker-end-width="0.3cm" draw:fill="none" draw:textarea-horizontal-align="center" draw:textarea-vertical-align="middle"/>
    </style:style>
    <style:style style:name="gr31" style:family="graphic" style:parent-style-name="objectwithoutfill">
      <style:graphic-properties draw:marker-end="Arrowheads_20_35" draw:marker-end-width="0.3cm" draw:fill="none" draw:textarea-horizontal-align="center" draw:textarea-vertical-align="middle"/>
    </style:style>
    <style:style style:name="gr32" style:family="graphic" style:parent-style-name="objectwithoutfill">
      <style:graphic-properties draw:marker-end="Arrowheads_20_36" draw:marker-end-width="0.3cm" draw:fill="none" draw:textarea-horizontal-align="center" draw:textarea-vertical-align="middle"/>
    </style:style>
    <style:style style:name="gr33" style:family="graphic" style:parent-style-name="objectwithoutfill">
      <style:graphic-properties draw:marker-end="Arrowheads_20_37" draw:marker-end-width="0.3cm" draw:fill="none" draw:textarea-horizontal-align="center" draw:textarea-vertical-align="middle"/>
    </style:style>
    <style:style style:name="gr34" style:family="graphic" style:parent-style-name="objectwithoutfill">
      <style:graphic-properties draw:marker-end="Arrowheads_20_38" draw:marker-end-width="0.3cm" draw:fill="none" draw:textarea-horizontal-align="center" draw:textarea-vertical-align="middle"/>
    </style:style>
    <style:style style:name="gr35" style:family="graphic" style:parent-style-name="objectwithoutfill">
      <style:graphic-properties draw:marker-end="Arrowheads_20_39" draw:marker-end-width="0.3cm" draw:fill="none" draw:textarea-horizontal-align="center" draw:textarea-vertical-align="middle"/>
    </style:style>
    <style:style style:name="gr36" style:family="graphic" style:parent-style-name="objectwithoutfill">
      <style:graphic-properties draw:marker-end="Arrowheads_20_40" draw:marker-end-width="0.3cm" draw:fill="none" draw:textarea-horizontal-align="center" draw:textarea-vertical-align="middle"/>
    </style:style>
    <style:style style:name="gr37" style:family="graphic" style:parent-style-name="objectwithoutfill">
      <style:graphic-properties draw:marker-end="Arrowheads_20_41" draw:marker-end-width="0.3cm" draw:fill="none" draw:textarea-horizontal-align="center" draw:textarea-vertical-align="middle"/>
    </style:style>
    <style:style style:name="gr38" style:family="graphic" style:parent-style-name="objectwithoutfill">
      <style:graphic-properties draw:marker-end="Arrowheads_20_42" draw:marker-end-width="0.3cm" draw:fill="none" draw:textarea-horizontal-align="center" draw:textarea-vertical-align="middle"/>
    </style:style>
    <style:style style:name="gr39" style:family="graphic" style:parent-style-name="objectwithoutfill">
      <style:graphic-properties draw:marker-end="Arrowheads_20_43" draw:marker-end-width="0.3cm" draw:fill="none" draw:textarea-horizontal-align="center" draw:textarea-vertical-align="middle"/>
    </style:style>
    <style:style style:name="gr40" style:family="graphic" style:parent-style-name="objectwithoutfill">
      <style:graphic-properties draw:marker-end="Arrowheads_20_44" draw:marker-end-width="0.3cm" draw:fill="none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5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05cm"/>
      <style:paragraph-properties style:writing-mode="lr-tb"/>
    </style:style>
    <style:style style:name="gr43" style:family="graphic" style:parent-style-name="standard">
      <style:graphic-properties svg:stroke-width="0.081cm" svg:stroke-color="#e20074" draw:marker-start-width="0.421cm" draw:marker-end-width="0.421cm" draw:fill-color="#e20074" draw:textarea-horizontal-align="justify" draw:textarea-vertical-align="middle" draw:auto-grow-height="false" fo:min-height="1.259cm" fo:min-width="4.5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26.424cm"/>
      <style:paragraph-properties style:writing-mode="lr-tb"/>
    </style:style>
    <style:style style:name="gr45" style:family="graphic" style:parent-style-name="objectwithoutfill">
      <style:graphic-properties draw:marker-end="Arrowheads_20_64" draw:marker-end-width="0.3cm" draw:fill="none" draw:textarea-horizontal-align="center" draw:textarea-vertical-align="middle"/>
    </style:style>
    <style:style style:name="gr46" style:family="graphic" style:parent-style-name="objectwithoutfill">
      <style:graphic-properties draw:marker-end="Arrowheads_20_65" draw:marker-end-width="0.3cm" draw:fill="none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  <style:paragraph-properties style:writing-mode="lr-tb"/>
    </style:style>
    <style:style style:name="gr48" style:family="graphic" style:parent-style-name="objectwithoutfill">
      <style:graphic-properties draw:marker-end="Arrowheads_20_66" draw:marker-end-width="0.3cm" draw:fill="none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1.40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26.401cm"/>
      <style:paragraph-properties style:writing-mode="lr-tb"/>
    </style:style>
    <style:style style:name="gr54" style:family="graphic" style:parent-style-name="standard">
      <style:graphic-properties svg:stroke-color="#3faf46" draw:fill-color="#b2b2b2" draw:textarea-horizontal-align="center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43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e20074"/>
      <style:paragraph-properties fo:text-align="center"/>
    </style:style>
    <style:style style:name="P4" style:family="paragraph">
      <loext:graphic-properties draw:fill-color="#005a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8pt" fo:font-weight="bold" style:font-weight-asian="bold" style:font-weight-complex="bold"/>
    </style:style>
    <style:style style:name="P9" style:family="paragraph">
      <loext:graphic-properties draw:fill="none" draw:fill-color="#e20074"/>
      <style:paragraph-properties style:writing-mode="lr-tb"/>
      <style:text-properties fo:color="#ffffff" loext:opacity="100%"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fo:font-size="14pt" fo:font-weight="bold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fo:font-size="14pt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30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36pt" fo:font-weight="bold" style:font-size-asian="36pt" style:font-size-complex="36pt"/>
    </style:style>
    <style:style style:name="P15" style:family="paragraph">
      <loext:graphic-properties draw:fill="none" draw:fill-color="#ffffff"/>
      <style:paragraph-properties style:writing-mode="lr-tb"/>
      <style:text-properties fo:font-size="28pt" fo:font-weight="bold" style:font-size-asian="28pt" style:font-size-complex="28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6pt" style:font-size-complex="16pt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loext:opacity="100%"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ffffff" loext:opacity="100%" fo:font-size="14pt" fo:font-weight="bold" style:font-size-asian="14pt" style:font-size-complex="14pt"/>
    </style:style>
    <style:style style:name="T6" style:family="text">
      <style:text-properties fo:color="#ffffff" loext:opacity="100%" fo:font-size="14pt" fo:font-weight="bold" style:font-weight-asian="bold" style:font-weight-complex="bold"/>
    </style:style>
    <style:style style:name="T7" style:family="text">
      <style:text-properties fo:font-size="30pt" fo:font-weight="bold" style:font-weight-asian="bold" style:font-weight-complex="bold"/>
    </style:style>
    <style:style style:name="T8" style:family="text">
      <style:text-properties fo:font-size="30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36pt" fo:font-weight="bold" style:font-size-asian="36pt" style:font-size-complex="36pt"/>
    </style:style>
    <style:style style:name="T11" style:family="text">
      <style:text-properties fo:font-size="28pt" fo:font-weight="bold" style:font-size-asian="28pt" style:font-size-complex="28pt"/>
    </style:style>
    <style:style style:name="T12" style:family="text">
      <style:text-properties fo:font-size="12pt" fo:font-weight="bold" style:font-size-asian="16pt" style:font-size-complex="16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cm" svg:y1="1cm" svg:x2="39.1cm" svg:y2="1cm">
          <text:p/>
        </draw:line>
        <draw:line draw:style-name="gr1" draw:text-style-name="P1" draw:layer="layout" svg:x1="39.1cm" svg:y1="1cm" svg:x2="39.1cm" svg:y2="21.86cm">
          <text:p/>
        </draw:line>
        <draw:line draw:style-name="gr1" draw:text-style-name="P1" draw:layer="layout" svg:x1="1cm" svg:y1="1cm" svg:x2="1cm" svg:y2="21.86cm">
          <text:p/>
        </draw:line>
        <draw:line draw:style-name="gr1" draw:text-style-name="P1" draw:layer="layout" svg:x1="0.9cm" svg:y1="21.86cm" svg:x2="39.127cm" svg:y2="21.86cm">
          <text:p/>
        </draw:line>
        <draw:custom-shape draw:style-name="gr2" draw:text-style-name="P2" draw:layer="layout" svg:width="19.939cm" svg:height="6.477cm" svg:x="16.621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1.524cm" svg:x="3.54cm" svg:y="6.8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524cm" svg:x="3.54cm" svg:y="9.5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2cm" svg:height="2.413cm" svg:x="21.582cm" svg:y="10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2.446cm" svg:height="2.921cm" svg:x="4.294cm" svg:y="1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45cm" svg:height="1.397cm" svg:x="2.524cm" svg:y="20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699cm" svg:height="1.397cm" svg:x="7.35cm" svg:y="2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699cm" svg:height="1.397cm" svg:x="12.303cm" svg:y="2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4.415cm" svg:height="1.397cm" svg:x="21.447cm" svg:y="19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4.826cm" svg:height="1.397cm" svg:x="26.273cm" svg:y="2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667cm" svg:height="1.397cm" svg:x="31.512cm" svg:y="19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8.871cm" svg:height="1.154cm" svg:x="6.099cm" svg:y="17.256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3.419cm" svg:height="1.361cm" svg:x="4.058cm" svg:y="6.945cm">
          <draw:text-box>
            <text:p><text:span text:style-name="T1">Custom SON</text:span></text:p>
            <text:p><text:span text:style-name="T1">Module 1</text:span></text:p>
          </draw:text-box>
        </draw:frame>
        <draw:frame draw:style-name="gr14" draw:text-style-name="P6" draw:layer="layout" svg:width="2.979cm" svg:height="1.361cm" svg:x="4.371cm" svg:y="9.594cm">
          <draw:text-box>
            <text:p><text:span text:style-name="T2">Nokia SON</text:span></text:p>
            <text:p><text:span text:style-name="T2">Module 1</text:span></text:p>
          </draw:text-box>
        </draw:frame>
        <draw:frame draw:style-name="gr15" draw:text-style-name="P7" draw:layer="layout" svg:width="13.235cm" svg:height="2.384cm" svg:x="23.39cm" svg:y="10.906cm">
          <draw:text-box>
            <text:p><text:span text:style-name="T3">Nokia Eden-Net SON</text:span></text:p>
            <text:p><text:span text:style-name="T3">Software Development Kit (SDK)</text:span></text:p>
          </draw:text-box>
        </draw:frame>
        <draw:frame draw:style-name="gr16" draw:text-style-name="P7" draw:layer="layout" svg:width="7.493cm" svg:height="2.616cm" svg:x="7.015cm" svg:y="14.827cm">
          <draw:text-box>
            <text:p><text:span text:style-name="T3">Nokia Eden-Net SON</text:span></text:p>
            <text:p><text:span text:style-name="T3">Distributed Engine</text:span></text:p>
            <text:p><text:span text:style-name="T3">Per Region or Per OSS</text:span></text:p>
          </draw:text-box>
        </draw:frame>
        <draw:frame draw:style-name="gr17" draw:text-style-name="P8" draw:layer="layout" svg:width="8.702cm" svg:height="0.962cm" svg:x="6.158cm" svg:y="17.318cm">
          <draw:text-box>
            <text:p><text:span text:style-name="T3">EdenNet SON OSS Adapter</text:span></text:p>
          </draw:text-box>
        </draw:frame>
        <draw:custom-shape draw:style-name="gr6" draw:text-style-name="P4" draw:layer="layout" svg:width="12.446cm" svg:height="2.921cm" svg:x="22.069cm" svg:y="14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8.89cm" svg:height="1.281cm" svg:x="23.86cm" svg:y="17.12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9.777cm" svg:height="2.616cm" svg:x="24.749cm" svg:y="14.843cm">
          <draw:text-box>
            <text:p><text:span text:style-name="T3">Nokia Eden-Net SON</text:span></text:p>
            <text:p><text:span text:style-name="T3">Distributed Engine</text:span></text:p>
            <text:p><text:span text:style-name="T3">Per Region or Per OSS</text:span></text:p>
          </draw:text-box>
        </draw:frame>
        <draw:frame draw:style-name="gr17" draw:text-style-name="P8" draw:layer="layout" svg:width="8.702cm" svg:height="0.962cm" svg:x="23.952cm" svg:y="17.294cm">
          <draw:text-box>
            <text:p><text:span text:style-name="T3">EdenNet SON OSS Adapter</text:span></text:p>
          </draw:text-box>
        </draw:frame>
        <draw:frame draw:style-name="gr19" draw:text-style-name="P9" draw:layer="layout" svg:width="3.749cm" svg:height="0.962cm" svg:x="2.903cm" svg:y="20.242cm">
          <draw:text-box>
            <text:p><text:span text:style-name="T3">Nokia OSS</text:span></text:p>
          </draw:text-box>
        </draw:frame>
        <draw:frame draw:style-name="gr20" draw:text-style-name="P8" draw:layer="layout" svg:width="4.701cm" svg:height="0.962cm" svg:x="7.397cm" svg:y="20.396cm">
          <draw:text-box>
            <text:p><text:span text:style-name="T3">Ericsson OSS</text:span></text:p>
          </draw:text-box>
        </draw:frame>
        <draw:frame draw:style-name="gr21" draw:text-style-name="P8" draw:layer="layout" svg:width="4.244cm" svg:height="0.962cm" svg:x="12.464cm" svg:y="20.242cm">
          <draw:text-box>
            <text:p><text:span text:style-name="T3">Huawei OSS</text:span></text:p>
          </draw:text-box>
        </draw:frame>
        <draw:frame draw:style-name="gr19" draw:text-style-name="P9" draw:layer="layout" svg:width="3.749cm" svg:height="0.962cm" svg:x="21.796cm" svg:y="20.188cm">
          <draw:text-box>
            <text:p><text:span text:style-name="T3">Nokia OSS</text:span></text:p>
          </draw:text-box>
        </draw:frame>
        <draw:frame draw:style-name="gr20" draw:text-style-name="P8" draw:layer="layout" svg:width="4.701cm" svg:height="0.962cm" svg:x="26.398cm" svg:y="20.442cm">
          <draw:text-box>
            <text:p><text:span text:style-name="T3">Ericsson OSS</text:span></text:p>
          </draw:text-box>
        </draw:frame>
        <draw:frame draw:style-name="gr21" draw:text-style-name="P8" draw:layer="layout" svg:width="4.244cm" svg:height="0.962cm" svg:x="31.773cm" svg:y="20.088cm">
          <draw:text-box>
            <text:p><text:span text:style-name="T3">Huawei OSS</text:span></text:p>
          </draw:text-box>
        </draw:frame>
        <draw:frame draw:style-name="gr22" draw:text-style-name="P7" draw:layer="layout" svg:width="5.472cm" svg:height="2.384cm" svg:x="17.64cm" svg:y="8.804cm">
          <draw:text-box>
            <text:p><text:span text:style-name="T4">PyCS Framework</text:span></text:p>
            <text:p><text:span text:style-name="T4">BISOS</text:span></text:p>
            <text:p><text:span text:style-name="T4">MaTOOF</text:span></text:p>
          </draw:text-box>
        </draw:frame>
        <draw:line draw:style-name="gr23" draw:text-style-name="P1" draw:layer="layout" svg:x1="8.747cm" svg:y1="7.731cm" svg:x2="16.621cm" svg:y2="9.266cm">
          <text:p/>
        </draw:line>
        <draw:line draw:style-name="gr24" draw:text-style-name="P1" draw:layer="layout" svg:x1="8.62cm" svg:y1="10.271cm" svg:x2="16.621cm" svg:y2="10.409cm">
          <text:p/>
        </draw:line>
        <draw:line draw:style-name="gr25" draw:text-style-name="P1" draw:layer="layout" svg:x1="27.797cm" svg:y1="13.076cm" svg:x2="27.797cm" svg:y2="14.346cm">
          <text:p/>
        </draw:line>
        <draw:line draw:style-name="gr26" draw:text-style-name="P1" draw:layer="layout" svg:x1="27.797cm" svg:y1="14.6cm" svg:x2="27.797cm" svg:y2="13.33cm">
          <text:p/>
        </draw:line>
        <draw:line draw:style-name="gr27" draw:text-style-name="P1" draw:layer="layout" svg:x1="9.128cm" svg:y1="18.41cm" svg:x2="6.588cm" svg:y2="19.553cm">
          <text:p/>
        </draw:line>
        <draw:line draw:style-name="gr28" draw:text-style-name="P1" draw:layer="layout" svg:x1="5.318cm" svg:y1="20.061cm" svg:x2="7.731cm" svg:y2="19.045cm">
          <text:p/>
        </draw:line>
        <draw:line draw:style-name="gr29" draw:text-style-name="P1" draw:layer="layout" svg:x1="9.89cm" svg:y1="18.41cm" svg:x2="9.89cm" svg:y2="19.934cm">
          <text:p/>
        </draw:line>
        <draw:line draw:style-name="gr30" draw:text-style-name="P1" draw:layer="layout" svg:x1="9.89cm" svg:y1="20.188cm" svg:x2="9.89cm" svg:y2="18.918cm">
          <text:p/>
        </draw:line>
        <draw:line draw:style-name="gr31" draw:text-style-name="P1" draw:layer="layout" svg:x1="12.43cm" svg:y1="18.41cm" svg:x2="13.7cm" svg:y2="19.796cm">
          <text:p/>
        </draw:line>
        <draw:line draw:style-name="gr32" draw:text-style-name="P1" draw:layer="layout" svg:x1="13.954cm" svg:y1="20.05cm" svg:x2="12.938cm" svg:y2="18.918cm">
          <text:p/>
        </draw:line>
        <draw:line draw:style-name="gr33" draw:text-style-name="P1" draw:layer="layout" svg:x1="28.432cm" svg:y1="18.41cm" svg:x2="28.432cm" svg:y2="19.807cm">
          <text:p/>
        </draw:line>
        <draw:line draw:style-name="gr34" draw:text-style-name="P1" draw:layer="layout" svg:x1="28.432cm" svg:y1="20.188cm" svg:x2="28.432cm" svg:y2="18.791cm">
          <text:p/>
        </draw:line>
        <draw:line draw:style-name="gr35" draw:text-style-name="P1" draw:layer="layout" svg:x1="26.4cm" svg:y1="18.41cm" svg:x2="25.003cm" svg:y2="19.68cm">
          <text:p/>
        </draw:line>
        <draw:line draw:style-name="gr36" draw:text-style-name="P1" draw:layer="layout" svg:x1="24.622cm" svg:y1="19.923cm" svg:x2="25.892cm" svg:y2="18.918cm">
          <text:p/>
        </draw:line>
        <draw:line draw:style-name="gr37" draw:text-style-name="P1" draw:layer="layout" svg:x1="30.591cm" svg:y1="18.41cm" svg:x2="32.242cm" svg:y2="19.68cm">
          <text:p/>
        </draw:line>
        <draw:line draw:style-name="gr38" draw:text-style-name="P1" draw:layer="layout" svg:x1="32.623cm" svg:y1="19.923cm" svg:x2="31.226cm" svg:y2="18.918cm">
          <text:p/>
        </draw:line>
        <draw:line draw:style-name="gr39" draw:text-style-name="P1" draw:layer="layout" svg:x1="24.976cm" svg:y1="12.949cm" svg:x2="17.229cm" svg:y2="14.854cm">
          <text:p/>
        </draw:line>
        <draw:line draw:style-name="gr40" draw:text-style-name="P1" draw:layer="layout" svg:x1="15.478cm" svg:y1="15.224cm" svg:x2="21.32cm" svg:y2="13.838cm">
          <text:p/>
        </draw:line>
        <draw:frame draw:style-name="gr41" draw:text-style-name="P10" draw:layer="layout" svg:width="3.059cm" svg:height="1.361cm" svg:x="4.372cm" svg:y="9.595cm">
          <draw:text-box>
            <text:p><text:span text:style-name="T5">Nokia SON</text:span></text:p>
            <text:p><text:span text:style-name="T5">Module 1</text:span></text:p>
          </draw:text-box>
        </draw:frame>
        <draw:custom-shape draw:style-name="gr4" draw:text-style-name="P4" draw:layer="layout" svg:width="5.08cm" svg:height="1.524cm" svg:x="3.513cm" svg:y="11.752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979cm" svg:height="1.361cm" svg:x="4.244cm" svg:y="11.788cm">
          <draw:text-box>
            <text:p><text:span text:style-name="T2">Nokia SON</text:span></text:p>
            <text:p><text:span text:style-name="T2">Module 1</text:span></text:p>
          </draw:text-box>
        </draw:frame>
        <draw:frame draw:style-name="gr41" draw:text-style-name="P10" draw:layer="layout" svg:width="3.059cm" svg:height="1.361cm" svg:x="4.245cm" svg:y="11.789cm">
          <draw:text-box>
            <text:p><text:span text:style-name="T5">Nokia SON</text:span></text:p>
            <text:p><text:span text:style-name="T5">Module N</text:span></text:p>
          </draw:text-box>
        </draw:frame>
        <draw:custom-shape draw:style-name="gr3" draw:text-style-name="P3" draw:layer="layout" svg:width="5.08cm" svg:height="1.524cm" svg:x="3.54cm" svg:y="6.818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3.55cm" svg:height="1.361cm" svg:x="4.058cm" svg:y="6.945cm">
          <draw:text-box>
            <text:p><text:span text:style-name="T6">Custom SON</text:span></text:p>
            <text:p><text:span text:style-name="T6">Module N</text:span></text:p>
          </draw:text-box>
        </draw:frame>
        <draw:custom-shape draw:style-name="gr43" draw:text-style-name="P3" draw:layer="layout" svg:width="5.08cm" svg:height="1.589cm" svg:x="3.54cm" svg:y="4.548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3.55cm" svg:height="1.361cm" svg:x="4.048cm" svg:y="4.81cm">
          <draw:text-box>
            <text:p><text:span text:style-name="T6">Custom SON</text:span></text:p>
            <text:p><text:span text:style-name="T6">Module 1</text:span></text:p>
          </draw:text-box>
        </draw:frame>
        <draw:frame draw:style-name="gr44" draw:text-style-name="P12" draw:layer="layout" svg:width="26.924cm" svg:height="1.905cm" svg:x="11.949cm" svg:y="1.354cm">
          <draw:text-box>
            <text:p><text:span text:style-name="T7">soncli.mcs <text:s/>-- An </text:span><text:span text:style-name="T8">After-Market</text:span><text:span text:style-name="T7"> Strategy </text:span></text:p>
          </draw:text-box>
        </draw:frame>
        <draw:line draw:style-name="gr45" draw:text-style-name="P1" draw:layer="layout" svg:x1="8.493cm" svg:y1="12.441cm" svg:x2="16.621cm" svg:y2="11.679cm">
          <text:p/>
        </draw:line>
        <draw:line draw:style-name="gr46" draw:text-style-name="P1" draw:layer="layout" svg:x1="8.62cm" svg:y1="5.699cm" svg:x2="16.621cm" svg:y2="8.758cm">
          <text:p/>
        </draw:line>
        <draw:frame draw:style-name="gr47" draw:text-style-name="P13" draw:layer="layout" svg:width="7.144cm" svg:height="1.343cm" svg:x="23.987cm" svg:y="7.542cm">
          <draw:text-box>
            <text:p><text:span text:style-name="T9">soncli.mcs</text:span></text:p>
          </draw:text-box>
        </draw:frame>
        <draw:line draw:style-name="gr48" draw:text-style-name="P1" draw:layer="layout" svg:x1="5.826cm" svg:y1="13.319cm" svg:x2="6.969cm" svg:y2="14.981cm">
          <text:p/>
        </draw:line>
        <draw:frame draw:style-name="gr49" draw:text-style-name="P14" draw:layer="layout" svg:width="2.54cm" svg:height="1.673cm" svg:x="18.018cm" svg:y="16.505cm">
          <draw:text-box>
            <text:p><text:span text:style-name="T10">. . .</text:span></text:p>
          </draw:text-box>
        </draw:frame>
        <draw:frame draw:style-name="gr50" draw:text-style-name="P15" draw:layer="layout" svg:width="2.478cm" svg:height="1.657cm" svg:x="5.08cm" svg:y="10.525cm">
          <draw:text-box>
            <text:p><text:span text:style-name="T11">. . .</text:span></text:p>
          </draw:text-box>
        </draw:frame>
        <draw:frame draw:style-name="gr51" draw:text-style-name="P15" draw:layer="layout" svg:width="2.54cm" svg:height="1.352cm" svg:x="4.937cm" svg:y="5.556cm">
          <draw:text-box>
            <text:p><text:span text:style-name="T11">. . .</text:span></text:p>
          </draw:text-box>
        </draw:frame>
        <draw:frame draw:style-name="gr52" draw:text-style-name="P16" draw:layer="layout" svg:width="2.471cm" svg:height="0.751cm" svg:x="4.302cm" svg:y="13.722cm">
          <draw:text-box>
            <text:p><text:span text:style-name="T12">SON-UI</text:span></text:p>
          </draw:text-box>
        </draw:frame>
        <draw:frame draw:style-name="gr53" draw:text-style-name="P12" draw:layer="layout" svg:width="26.901cm" svg:height="2.613cm" svg:x="8.62cm" svg:y="1.489cm">
          <draw:text-box>
            <text:p><text:span text:style-name="T7"><text:s/></text:span></text:p>
            <text:p><text:span text:style-name="T7">for Nokia EdenNet SON Development &amp; Deployment </text:span></text:p>
          </draw:text-box>
        </draw:frame>
        <draw:polygon draw:style-name="gr54" draw:text-style-name="P17" draw:layer="layout" svg:width="24.764cm" svg:height="7.746cm" svg:x="13.065cm" svg:y="5.318cm" svg:viewBox="0 0 24765 7747" draw:points="0,7747 0,0 24765,0 24765,1524 1651,1524 1651,7747 1651,7747">
          <text:p/>
        </draw:polygon>
        <draw:frame draw:style-name="gr55" draw:text-style-name="P18" draw:layer="layout" svg:width="10.937cm" svg:height="1.119cm" svg:x="21.432cm" svg:y="5.572cm">
          <draw:text-box>
            <text:p><text:span text:style-name="T13">Command Line Interface (CLI)</text:span></text:p>
          </draw:text-box>
        </draw:frame>
        <draw:frame draw:style-name="gr56" draw:text-style-name="P19" draw:layer="layout" svg:width="1.823cm" svg:height="0.962cm" draw:transform="rotate (-1.5707963267949) translate (14.349cm 8.358cm)">
          <draw:text-box>
            <text:p>C L I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Mohsen Banan</meta:initial-creator>
    <meta:creation-date>2008-06-01T19:57:48</meta:creation-date>
    <dc:date>2026-03-07T11:50:26.385595803</dc:date>
    <meta:editing-cycles>77</meta:editing-cycles>
    <meta:editing-duration>PT9H21M40S</meta:editing-duration>
    <meta:print-date>2017-04-17T17:26:32.987291272</meta:print-date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