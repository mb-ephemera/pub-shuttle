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ff00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081cm" svg:stroke-color="#3465a4" draw:marker-start-width="0.421cm" draw:marker-end-width="0.421cm" draw:fill-color="#005aff" draw:textarea-horizontal-align="justify" draw:textarea-vertical-align="middle" draw:auto-grow-height="false" fo:min-height="1.602cm" fo:min-width="6.87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465a4" draw:marker-start-width="0.421cm" draw:marker-end-width="0.421cm" draw:fill-color="#005aff" draw:textarea-horizontal-align="justify" draw:textarea-vertical-align="middle" draw:auto-grow-height="false" fo:min-height="1.712cm" fo:min-width="7.41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3465a4" draw:marker-start-width="0.421cm" draw:marker-end-width="0.421cm" draw:fill-color="#005aff" draw:textarea-horizontal-align="justify" draw:textarea-vertical-align="middle" draw:auto-grow-height="false" fo:min-height="2.019cm" fo:min-width="9.1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916cm" fo:min-width="3.283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709cm" fo:min-width="3.283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761cm" fo:min-width="3.28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568cm" fo:min-width="2.474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111111" draw:textarea-horizontal-align="left" draw:auto-grow-height="true" draw:auto-grow-width="true" fo:min-height="1.267cm" fo:min-width="23.7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e20074" draw:textarea-horizontal-align="left" draw:auto-grow-height="true" draw:auto-grow-width="false" fo:min-height="1.893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352cm" draw:marker-end="Arrowheads_20_1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marker-end="Arrowheads_20_5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heads_20_6" draw:marker-end-width="0.3cm" draw:fill="none" draw:textarea-horizontal-align="center" draw:textarea-vertical-align="middle"/>
    </style:style>
    <style:style style:name="gr19" style:family="graphic" style:parent-style-name="standard">
      <style:graphic-properties svg:stroke-width="0.018cm" draw:marker-start-width="0.327cm" draw:marker-end-width="0.327cm" draw:fill-color="#005aff" draw:textarea-horizontal-align="justify" draw:textarea-vertical-align="middle" draw:auto-grow-height="false" fo:min-height="0.875cm" fo:min-width="8.626cm" fo:padding-top="0.134cm" fo:padding-bottom="0.134cm" fo:padding-left="0.259cm" fo:padding-right="0.259cm"/>
    </style:style>
    <style:style style:name="gr20" style:family="graphic" style:parent-style-name="objectwithoutfill">
      <style:graphic-properties draw:marker-end="Arrowheads_20_7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horizontal-align="center" draw:textarea-vertical-align="middle"/>
    </style:style>
    <style:style style:name="gr22" style:family="graphic" style:parent-style-name="objectwithoutfill">
      <style:graphic-properties draw:marker-end="Arrowheads_20_10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marker-end="Arrowheads_20_11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end="Arrowheads_20_14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marker-end="Arrowheads_20_15" draw:marker-end-width="0.3cm" draw:fill="none" draw:textarea-horizontal-align="center" draw:textarea-vertical-align="middle"/>
    </style:style>
    <style:style style:name="gr27" style:family="graphic" style:parent-style-name="objectwithoutfill">
      <style:graphic-properties draw:marker-end="Arrowheads_20_16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Arrowheads_20_17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draw:marker-end="Arrowheads_20_18" draw:marker-end-width="0.3cm" draw:fill="none" draw:textarea-horizontal-align="center" draw:textarea-vertical-align="middle"/>
    </style:style>
    <style:style style:name="gr30" style:family="graphic" style:parent-style-name="objectwithoutfill">
      <style:graphic-properties draw:marker-end="Arrowheads_20_19" draw:marker-end-width="0.3cm" draw:fill="none" draw:textarea-horizontal-align="center" draw:textarea-vertical-align="middle"/>
    </style:style>
    <style:style style:name="gr31" style:family="graphic" style:parent-style-name="objectwithoutfill">
      <style:graphic-properties draw:marker-end="Arrowheads_20_20" draw:marker-end-width="0.3cm" draw:fill="none" draw:textarea-horizontal-align="center" draw:textarea-vertical-align="middle"/>
    </style:style>
    <style:style style:name="gr32" style:family="graphic" style:parent-style-name="objectwithoutfill">
      <style:graphic-properties draw:marker-end="Arrowheads_20_21" draw:marker-end-width="0.3cm" draw:fill="none" draw:textarea-horizontal-align="center" draw:textarea-vertical-align="middle"/>
    </style:style>
    <style:style style:name="gr33" style:family="graphic" style:parent-style-name="objectwithoutfill">
      <style:graphic-properties draw:marker-end="Arrowheads_20_22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end="Arrowheads_20_23" draw:marker-end-width="0.3cm" draw:fill="none" draw:textarea-horizontal-align="center" draw:textarea-vertical-align="middle"/>
    </style:style>
    <style:style style:name="gr35" style:family="graphic" style:parent-style-name="objectwithoutfill">
      <style:graphic-properties draw:marker-end="Arrowheads_20_24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marker-end="Arrowheads_20_25" draw:marker-end-width="0.3cm" draw:fill="none" draw:textarea-horizontal-align="center" draw:textarea-vertical-align="middle"/>
    </style:style>
    <style:style style:name="gr37" style:family="graphic" style:parent-style-name="objectwithoutfill">
      <style:graphic-properties draw:marker-end="Arrowheads_20_26" draw:marker-end-width="0.3cm"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6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3cm" fo:min-width="8.76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e20074" draw:textarea-horizontal-align="left" draw:auto-grow-height="true" draw:auto-grow-width="true" fo:min-height="0.712cm" fo:min-width="3.24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9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e20074" draw:textarea-horizontal-align="left" draw:auto-grow-height="true" draw:auto-grow-width="true" fo:min-height="1.111cm" fo:min-width="1.649cm"/>
      <style:paragraph-properties style:writing-mode="lr-tb"/>
    </style:style>
    <style:style style:name="gr50" style:family="graphic" style:parent-style-name="objectwithoutfill">
      <style:graphic-properties draw:marker-end="Arrowheads_20_27" draw:marker-end-width="0.3cm" draw:fill="none" draw:textarea-horizontal-align="center" draw:textarea-vertical-align="middle"/>
    </style:style>
    <style:style style:name="gr51" style:family="graphic" style:parent-style-name="objectwithoutfill">
      <style:graphic-properties draw:marker-end="Arrowheads_20_28" draw:marker-end-width="0.3cm" draw:fill="none" draw:textarea-horizontal-align="center" draw:textarea-vertical-align="middle"/>
    </style:style>
    <style:style style:name="gr52" style:family="graphic" style:parent-style-name="standard">
      <style:graphic-properties draw:fill-color="#005aff" draw:textarea-horizontal-align="justify" draw:textarea-vertical-align="middle" draw:auto-grow-height="false" fo:min-height="0.786cm" fo:min-width="2.4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28cm"/>
      <style:paragraph-properties style:writing-mode="lr-tb"/>
    </style:style>
    <style:style style:name="gr54" style:family="graphic" style:parent-style-name="standard">
      <style:graphic-properties draw:fill-color="#e20074" draw:textarea-horizontal-align="justify" draw:textarea-vertical-align="middle" draw:auto-grow-height="false" fo:min-height="1.126cm" fo:min-width="4.43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27cm"/>
      <style:paragraph-properties style:writing-mode="lr-tb"/>
    </style:style>
    <style:style style:name="gr57" style:family="graphic" style:parent-style-name="standard">
      <style:graphic-properties svg:stroke-color="#005aff" draw:fill-color="#005aff" draw:textarea-horizontal-align="justify" draw:textarea-vertical-align="middle" draw:auto-grow-height="false" fo:min-height="1.126cm" fo:min-width="4.43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59cm"/>
      <style:paragraph-properties style:writing-mode="lr-tb"/>
    </style:style>
    <style:style style:name="gr59" style:family="graphic" style:parent-style-name="objectwithoutfill">
      <style:graphic-properties draw:marker-end="Arrowheads_20_30" draw:marker-end-width="0.3cm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5aff"/>
      <style:paragraph-properties fo:text-align="center"/>
    </style:style>
    <style:style style:name="P3" style:family="paragraph">
      <loext:graphic-properties draw:fill-color="#e20074"/>
      <style:paragraph-properties fo:text-align="center"/>
    </style:style>
    <style:style style:name="P4" style:family="paragraph">
      <loext:graphic-properties draw:fill="none" draw:fill-color="#111111"/>
      <style:paragraph-properties style:writing-mode="lr-tb"/>
      <style:text-properties fo:color="#000000" loext:opacity="100%" fo:font-size="32pt" fo:font-weight="bold" fo:background-color="#000000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6" style:family="paragraph">
      <loext:graphic-properties draw:fill="none" draw:fill-color="#e20074"/>
      <style:paragraph-properties style:writing-mode="lr-tb"/>
      <style:text-properties fo:font-size="48pt" style:font-size-asian="48pt" style:font-size-complex="48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e20074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e20074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14pt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weight-asian="bold" style:font-weight-complex="bold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 loext:opacity="100%" fo:font-size="18pt" fo:font-weight="bold" style:font-weight-asian="bold" style:font-weight-complex="bold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size="14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cm" svg:y1="1cm" svg:x2="39.64cm" svg:y2="1cm">
          <text:p/>
        </draw:line>
        <draw:line draw:style-name="gr1" draw:text-style-name="P1" draw:layer="layout" svg:x1="39.64cm" svg:y1="1cm" svg:x2="39.64cm" svg:y2="21.86cm">
          <text:p/>
        </draw:line>
        <draw:line draw:style-name="gr1" draw:text-style-name="P1" draw:layer="layout" svg:x1="39.64cm" svg:y1="21.86cm" svg:x2="1cm" svg:y2="21.86cm">
          <text:p/>
        </draw:line>
        <draw:line draw:style-name="gr1" draw:text-style-name="P1" draw:layer="layout" svg:x1="1cm" svg:y1="0.873cm" svg:x2="1cm" svg:y2="21.86cm">
          <text:p/>
        </draw:line>
        <draw:custom-shape draw:style-name="gr2" draw:text-style-name="P2" draw:layer="layout" svg:width="10.541cm" svg:height="2.732cm" svg:x="6.207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1.303cm" svg:height="2.886cm" svg:x="24.768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3.716cm" svg:height="3.321cm" svg:x="13.192cm" svg:y="1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461cm" svg:height="1.762cm" svg:x="4.575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461cm" svg:height="1.467cm" svg:x="17.256cm" svg:y="17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461cm" svg:height="1.543cm" svg:x="30.11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27cm" svg:x="2.405cm" svg:y="19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27cm" svg:x="7.958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27cm" svg:x="15.378cm" svg:y="20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27cm" svg:x="20.431cm" svg:y="2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27cm" svg:x="27.986cm" svg:y="19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27cm" svg:x="33.193cm" svg:y="19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4.247cm" svg:height="1.517cm" svg:x="9.036cm" svg:y="1.638cm">
          <draw:text-box>
            <text:p><text:span text:style-name="T1">Abstract Nokia EdenNet SON Ecosystem</text:span></text:p>
          </draw:text-box>
        </draw:frame>
        <draw:frame draw:style-name="gr10" draw:text-style-name="P5" draw:layer="layout" svg:width="1.912cm" svg:height="2.143cm" svg:x="27.974cm" svg:y="3.978cm">
          <draw:text-box>
            <text:p><text:span text:style-name="T2">...</text:span></text:p>
          </draw:text-box>
        </draw:frame>
        <draw:frame draw:style-name="gr11" draw:text-style-name="P6" draw:layer="layout" svg:width="1.912cm" svg:height="2.143cm" svg:x="10.164cm" svg:y="3.948cm">
          <draw:text-box>
            <text:p><text:span text:style-name="T2">...</text:span></text:p>
          </draw:text-box>
        </draw:frame>
        <draw:line draw:style-name="gr12" draw:text-style-name="P1" draw:layer="layout" svg:x1="15.986cm" svg:y1="6.08cm" svg:x2="14.462cm" svg:y2="7.223cm">
          <text:p/>
        </draw:line>
        <draw:line draw:style-name="gr13" draw:text-style-name="P1" draw:layer="layout" svg:x1="14.716cm" svg:y1="7.034cm" svg:x2="13.573cm" svg:y2="7.985cm">
          <text:p/>
        </draw:line>
        <draw:line draw:style-name="gr14" draw:text-style-name="P1" draw:layer="layout" svg:x1="23.225cm" svg:y1="6.08cm" svg:x2="17.764cm" svg:y2="7.858cm">
          <text:p/>
        </draw:line>
        <draw:line draw:style-name="gr13" draw:text-style-name="P1" draw:layer="layout" svg:x1="18.018cm" svg:y1="7.731cm" svg:x2="15.986cm" svg:y2="8.558cm">
          <text:p/>
        </draw:line>
        <draw:line draw:style-name="gr15" draw:text-style-name="P1" draw:layer="layout" svg:x1="12.684cm" svg:y1="10.525cm" svg:x2="14.208cm" svg:y2="11.86cm">
          <text:p/>
        </draw:line>
        <draw:line draw:style-name="gr16" draw:text-style-name="P1" draw:layer="layout" svg:x1="14.589cm" svg:y1="12.241cm" svg:x2="13.192cm" svg:y2="10.971cm">
          <text:p/>
        </draw:line>
        <draw:line draw:style-name="gr17" draw:text-style-name="P1" draw:layer="layout" svg:x1="30.464cm" svg:y1="11.922cm" svg:x2="27.543cm" svg:y2="13.319cm">
          <text:p/>
        </draw:line>
        <draw:line draw:style-name="gr18" draw:text-style-name="P1" draw:layer="layout" svg:x1="26.781cm" svg:y1="13.7cm" svg:x2="28.94cm" svg:y2="12.684cm">
          <text:p/>
        </draw:line>
        <draw:custom-shape draw:style-name="gr19" draw:text-style-name="P2" draw:layer="layout" svg:width="9.144cm" svg:height="1.143cm" svg:x="15.351cm" svg:y="14.589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7.129cm" svg:y1="6.08cm" svg:x2="18.78cm" svg:y2="6.969cm">
          <text:p/>
        </draw:line>
        <draw:line draw:style-name="gr13" draw:text-style-name="P1" draw:layer="layout" svg:x1="23.606cm" svg:y1="9.255cm" svg:x2="24.876cm" svg:y2="10.144cm">
          <text:p/>
        </draw:line>
        <draw:line draw:style-name="gr21" draw:text-style-name="P1" draw:layer="layout" svg:x1="23.86cm" svg:y1="6.08cm" svg:x2="27.543cm" svg:y2="7.731cm">
          <text:p/>
        </draw:line>
        <draw:line draw:style-name="gr22" draw:text-style-name="P1" draw:layer="layout" svg:x1="9.509cm" svg:y1="16.875cm" svg:x2="12.43cm" svg:y2="16.051cm">
          <text:p/>
        </draw:line>
        <draw:line draw:style-name="gr23" draw:text-style-name="P1" draw:layer="layout" svg:x1="15.351cm" svg:y1="15.289cm" svg:x2="11.033cm" svg:y2="16.432cm">
          <text:p/>
        </draw:line>
        <draw:line draw:style-name="gr24" draw:text-style-name="P1" draw:layer="layout" svg:x1="24.495cm" svg:y1="15.416cm" svg:x2="28.813cm" svg:y2="16.621cm">
          <text:p/>
        </draw:line>
        <draw:line draw:style-name="gr25" draw:text-style-name="P1" draw:layer="layout" svg:x1="30.21cm" svg:y1="17.002cm" svg:x2="27.67cm" svg:y2="16.305cm">
          <text:p/>
        </draw:line>
        <draw:line draw:style-name="gr26" draw:text-style-name="P1" draw:layer="layout" svg:x1="5.445cm" svg:y1="18.083cm" svg:x2="4.683cm" svg:y2="19.48cm">
          <text:p/>
        </draw:line>
        <draw:line draw:style-name="gr27" draw:text-style-name="P1" draw:layer="layout" svg:x1="4.556cm" svg:y1="19.669cm" svg:x2="5.191cm" svg:y2="18.591cm">
          <text:p/>
        </draw:line>
        <draw:line draw:style-name="gr28" draw:text-style-name="P1" draw:layer="layout" svg:x1="8.62cm" svg:y1="18.21cm" svg:x2="9.636cm" svg:y2="19.415cm">
          <text:p/>
        </draw:line>
        <draw:line draw:style-name="gr29" draw:text-style-name="P1" draw:layer="layout" svg:x1="9.99cm" svg:y1="19.796cm" svg:x2="9.128cm" svg:y2="18.78cm">
          <text:p/>
        </draw:line>
        <draw:line draw:style-name="gr30" draw:text-style-name="P1" draw:layer="layout" svg:x1="18.399cm" svg:y1="18.78cm" svg:x2="17.637cm" svg:y2="19.669cm">
          <text:p/>
        </draw:line>
        <draw:line draw:style-name="gr31" draw:text-style-name="P1" draw:layer="layout" svg:x1="17.256cm" svg:y1="20.05cm" svg:x2="18.272cm" svg:y2="18.972cm">
          <text:p/>
        </draw:line>
        <draw:line draw:style-name="gr32" draw:text-style-name="P1" draw:layer="layout" svg:x1="21.447cm" svg:y1="18.78cm" svg:x2="22.082cm" svg:y2="19.734cm">
          <text:p/>
        </draw:line>
        <draw:line draw:style-name="gr33" draw:text-style-name="P1" draw:layer="layout" svg:x1="22.336cm" svg:y1="20.115cm" svg:x2="21.574cm" svg:y2="18.972cm">
          <text:p/>
        </draw:line>
        <draw:line draw:style-name="gr34" draw:text-style-name="P1" draw:layer="layout" svg:x1="31.542cm" svg:y1="17.783cm" svg:x2="30.272cm" svg:y2="19.18cm">
          <text:p/>
        </draw:line>
        <draw:line draw:style-name="gr35" draw:text-style-name="P1" draw:layer="layout" svg:x1="29.637cm" svg:y1="19.688cm" svg:x2="31.161cm" svg:y2="18.291cm">
          <text:p/>
        </draw:line>
        <draw:line draw:style-name="gr36" draw:text-style-name="P1" draw:layer="layout" svg:x1="33.955cm" svg:y1="17.91cm" svg:x2="35.225cm" svg:y2="19.307cm">
          <text:p/>
        </draw:line>
        <draw:line draw:style-name="gr37" draw:text-style-name="P1" draw:layer="layout" svg:x1="35.606cm" svg:y1="19.688cm" svg:x2="34.463cm" svg:y2="18.418cm">
          <text:p/>
        </draw:line>
        <draw:frame draw:style-name="gr38" draw:text-style-name="P7" draw:layer="layout" svg:width="6.746cm" svg:height="1.673cm" svg:x="8.144cm" svg:y="8.431cm">
          <draw:text-box>
            <text:p><text:span text:style-name="T3">Nokia Eden-Net SON</text:span></text:p>
            <text:p><text:span text:style-name="T3">Web User Interface</text:span></text:p>
          </draw:text-box>
        </draw:frame>
        <draw:frame draw:style-name="gr39" draw:text-style-name="P8" draw:layer="layout" svg:width="10.476cm" svg:height="1.773cm" svg:x="25.576cm" svg:y="9.514cm">
          <draw:text-box>
            <text:p><text:span text:style-name="T3">Nokia Eden-Net SON</text:span></text:p>
            <text:p><text:span text:style-name="T3">Software Development Kit (SDK)</text:span></text:p>
          </draw:text-box>
        </draw:frame>
        <draw:frame draw:style-name="gr40" draw:text-style-name="P8" draw:layer="layout" svg:width="7.574cm" svg:height="2.616cm" svg:x="16.667cm" svg:y="11.922cm">
          <draw:text-box>
            <text:p><text:span text:style-name="T3">Nokia Eden-Net SON</text:span></text:p>
            <text:p><text:span text:style-name="T3">Distributed Engine</text:span></text:p>
            <text:p><text:span text:style-name="T3">Per Region or Per OSS</text:span></text:p>
          </draw:text-box>
        </draw:frame>
        <draw:frame draw:style-name="gr41" draw:text-style-name="P7" draw:layer="layout" svg:width="9.263cm" svg:height="1.543cm" svg:x="15.424cm" svg:y="14.67cm">
          <draw:text-box draw:corner-radius="0.146cm">
            <text:p><text:span text:style-name="T3">EdenNet SON OSS Adapters</text:span></text:p>
          </draw:text-box>
        </draw:frame>
        <draw:frame draw:style-name="gr42" draw:text-style-name="P9" draw:layer="layout" svg:width="3.749cm" svg:height="0.962cm" svg:x="5.416cm" svg:y="16.921cm">
          <draw:text-box>
            <text:p><text:span text:style-name="T3">Nokia OSS</text:span></text:p>
          </draw:text-box>
        </draw:frame>
        <draw:frame draw:style-name="gr43" draw:text-style-name="P7" draw:layer="layout" svg:width="4.701cm" svg:height="0.962cm" svg:x="17.764cm" svg:y="17.694cm">
          <draw:text-box>
            <text:p><text:span text:style-name="T3">Ericsson OSS</text:span></text:p>
          </draw:text-box>
        </draw:frame>
        <draw:frame draw:style-name="gr44" draw:text-style-name="P7" draw:layer="layout" svg:width="4.244cm" svg:height="0.962cm" svg:x="30.904cm" svg:y="16.667cm">
          <draw:text-box>
            <text:p><text:span text:style-name="T3">Huawei OSS</text:span></text:p>
          </draw:text-box>
        </draw:frame>
        <draw:frame draw:style-name="gr45" draw:text-style-name="P10" draw:layer="layout" svg:width="2.233cm" svg:height="1.361cm" svg:x="34.382cm" svg:y="19.705cm">
          <draw:text-box>
            <text:p><text:span text:style-name="T4">Huawei</text:span></text:p>
            <text:p><text:span text:style-name="T4">Node N</text:span></text:p>
          </draw:text-box>
        </draw:frame>
        <draw:frame draw:style-name="gr46" draw:text-style-name="P11" draw:layer="layout" svg:width="2.178cm" svg:height="1.916cm" svg:x="9.109cm" svg:y="19.796cm">
          <draw:text-box>
            <text:p><text:span text:style-name="T4">Nokia</text:span></text:p>
            <text:p><text:span text:style-name="T4">Node N</text:span></text:p>
          </draw:text-box>
        </draw:frame>
        <draw:frame draw:style-name="gr47" draw:text-style-name="P11" draw:layer="layout" svg:width="2.593cm" svg:height="1.361cm" svg:x="21.453cm" svg:y="20.088cm">
          <draw:text-box>
            <text:p><text:span text:style-name="T4">Ericsson</text:span></text:p>
            <text:p><text:span text:style-name="T4">Node N</text:span></text:p>
          </draw:text-box>
        </draw:frame>
        <draw:frame draw:style-name="gr45" draw:text-style-name="P10" draw:layer="layout" svg:width="2.233cm" svg:height="1.361cm" svg:x="29.085cm" svg:y="19.688cm">
          <draw:text-box>
            <text:p><text:span text:style-name="T4">Huawei</text:span></text:p>
            <text:p><text:span text:style-name="T4">Node 1</text:span></text:p>
          </draw:text-box>
        </draw:frame>
        <draw:frame draw:style-name="gr48" draw:text-style-name="P10" draw:layer="layout" svg:width="3.302cm" svg:height="1.397cm" svg:x="16.494cm" svg:y="20.088cm">
          <draw:text-box>
            <text:p><text:span text:style-name="T4">Ericsson</text:span></text:p>
            <text:p><text:span text:style-name="T4">Node 1</text:span></text:p>
          </draw:text-box>
        </draw:frame>
        <draw:frame draw:style-name="gr49" draw:text-style-name="P12" draw:layer="layout" svg:width="2.149cm" svg:height="1.361cm" svg:x="3.601cm" svg:y="19.688cm">
          <draw:text-box>
            <text:p><text:span text:style-name="T4">Nokia</text:span></text:p>
            <text:p><text:span text:style-name="T4">Node 1</text:span></text:p>
          </draw:text-box>
        </draw:frame>
        <draw:line draw:style-name="gr50" draw:text-style-name="P1" draw:layer="layout" svg:x1="20.05cm" svg:y1="15.797cm" svg:x2="20.05cm" svg:y2="17.194cm">
          <text:p/>
        </draw:line>
        <draw:line draw:style-name="gr51" draw:text-style-name="P1" draw:layer="layout" svg:x1="20.05cm" svg:y1="17.448cm" svg:x2="20.05cm" svg:y2="16.178cm">
          <text:p/>
        </draw:line>
        <draw:custom-shape draw:style-name="gr52" draw:text-style-name="P2" draw:layer="layout" svg:width="4.445cm" svg:height="1.57cm" svg:x="19.422cm" svg:y="7.842cm">
          <text:p/>
          <draw:enhanced-geometry svg:viewBox="0 0 21600 21600" draw:glue-points="?f6 10800 10800 21600 ?f5 10800 10800 0" draw:text-areas="?f3 ?f3 ?f4 ?f4" draw:type="trapezoid" draw:modifiers="3460.8011113683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3" draw:text-style-name="P13" draw:layer="layout" svg:width="4.028cm" svg:height="1.673cm" svg:x="19.779cm" svg:y="7.793cm">
          <draw:text-box>
            <text:p><text:span text:style-name="T5">SON Python</text:span></text:p>
            <text:p><text:span text:style-name="T5"><text:s text:c="5"/></text:span><text:span text:style-name="T5">API</text:span></text:p>
          </draw:text-box>
        </draw:frame>
        <draw:custom-shape draw:style-name="gr54" draw:text-style-name="P3" draw:layer="layout" svg:width="5.08cm" svg:height="1.524cm" svg:x="3.813cm" svg:y="4.5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5.08cm" svg:height="1.524cm" svg:x="12.811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4" draw:layer="layout" svg:width="3.55cm" svg:height="1.361cm" svg:x="13.833cm" svg:y="4.683cm">
          <draw:text-box>
            <text:p><text:span text:style-name="T6">Custom SON</text:span></text:p>
            <text:p><text:span text:style-name="T6">Module 1</text:span></text:p>
          </draw:text-box>
        </draw:frame>
        <draw:frame draw:style-name="gr56" draw:text-style-name="P15" draw:layer="layout" svg:width="3.927cm" svg:height="1.361cm" svg:x="4.575cm" svg:y="4.67cm">
          <draw:text-box>
            <text:p><text:span text:style-name="T6">Custom SON</text:span></text:p>
            <text:p><text:span text:style-name="T6">Module N</text:span></text:p>
          </draw:text-box>
        </draw:frame>
        <draw:custom-shape draw:style-name="gr57" draw:text-style-name="P2" draw:layer="layout" svg:width="5.08cm" svg:height="1.524cm" svg:x="31.226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5.08cm" svg:height="1.524cm" svg:x="21.955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0" draw:layer="layout" svg:width="3.059cm" svg:height="1.361cm" svg:x="23.087cm" svg:y="4.683cm">
          <draw:text-box>
            <text:p><text:span text:style-name="T4">Nokia SON</text:span></text:p>
            <text:p><text:span text:style-name="T4">Module 1</text:span></text:p>
          </draw:text-box>
        </draw:frame>
        <draw:frame draw:style-name="gr58" draw:text-style-name="P10" draw:layer="layout" svg:width="3.059cm" svg:height="1.361cm" svg:x="32.242cm" svg:y="4.683cm">
          <draw:text-box>
            <text:p><text:span text:style-name="T4">Nokia SON</text:span></text:p>
            <text:p><text:span text:style-name="T4">Module N</text:span></text:p>
          </draw:text-box>
        </draw:frame>
        <draw:line draw:style-name="gr59" draw:text-style-name="P1" draw:layer="layout" svg:x1="23.299cm" svg:y1="9.085cm" svg:x2="24.315cm" svg:y2="9.72cm">
          <text:p/>
        </draw:line>
        <draw:line draw:style-name="gr13" draw:text-style-name="P1" draw:layer="layout" svg:x1="26.908cm" svg:y1="7.45cm" svg:x2="30.718cm" svg:y2="9.101cm">
          <text:p/>
        </draw:line>
        <draw:line draw:style-name="gr13" draw:text-style-name="P1" draw:layer="layout" svg:x1="18.526cm" svg:y1="6.842cm" svg:x2="20.558cm" svg:y2="7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3-07T12:59:39.485770996</dc:date>
    <meta:editing-cycles>75</meta:editing-cycles>
    <meta:editing-duration>PT9H18M11S</meta:editing-duration>
    <meta:print-date>2017-04-17T17:26:32.987291272</meta:print-date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