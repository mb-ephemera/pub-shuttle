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8d281e" draw:marker-start-width="0.686cm" draw:marker-end-width="0.686cm" draw:fill-color="#fff5ce" draw:textarea-horizontal-align="justify" draw:textarea-vertical-align="middle" draw:auto-grow-height="false" fo:min-height="17.911cm" fo:min-width="35.441cm" fo:padding-top="0.252cm" fo:padding-bottom="0.252cm" fo:padding-left="0.377cm" fo:padding-right="0.37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6.7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6.3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1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8.397cm"/>
      <style:paragraph-properties style:writing-mode="lr-tb"/>
    </style:style>
    <style:style style:name="gr6" style:family="graphic" style:parent-style-name="objectwithoutfill">
      <style:graphic-properties svg:stroke-width="0.212cm" svg:stroke-color="#355269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468a1a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650953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bf819e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b7b3ca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729fcf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ffd428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ea7500" draw:marker-start-width="0.617cm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14" style:family="graphic" style:parent-style-name="objectwithoutfill">
      <style:graphic-properties svg:stroke-width="0.212cm" svg:stroke-color="#5eb91e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ea7500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7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9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5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0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7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496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5b277d" loext:opacity="100%" loext:color-lum-mod="100%" loext:color-lum-off="0%" style:font-name="XB Zar1" fo:font-size="26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color="#5b277d" loext:opacity="100%" style:font-name="XB Zar1" fo:font-size="26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6.195cm" svg:height="18.415cm" svg:x="2.27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62cm" svg:height="2.25cm" svg:x="16.412cm" svg:y="18.89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818cm" svg:height="1.27cm" svg:x="16.438cm" svg:y="19.34cm">
          <draw:text-box>
            <text:p><text:span text:style-name="T1">Debian + Python </text:span></text:p>
          </draw:text-box>
        </draw:frame>
        <draw:frame draw:style-name="gr4" draw:text-style-name="P4" draw:layer="layout" svg:width="16.635cm" svg:height="1.038cm" svg:x="4.05cm" svg:y="3.54cm">
          <draw:text-box>
            <text:p><text:span text:style-name="T2">PyCS Facilities: <text:s/>facter.ics <text:s/>sbom.pcs <text:s/>gitist.pcs </text:span></text:p>
          </draw:text-box>
        </draw:frame>
        <draw:frame draw:style-name="gr5" draw:text-style-name="P5" draw:layer="layout" svg:width="8.897cm" svg:height="1.644cm" svg:x="15.598cm" svg:y="1cm">
          <draw:text-box>
            <text:p><text:span text:style-name="T3">PyCS <text:s/>Framework</text:span></text:p>
          </draw:text-box>
        </draw:frame>
        <draw:line draw:style-name="gr6" draw:text-style-name="P6" draw:layer="layout" svg:x1="16.34cm" svg:y1="21.22cm" svg:x2="16.34cm" svg:y2="18.68cm">
          <text:p/>
        </draw:line>
        <draw:line draw:style-name="gr6" draw:text-style-name="P6" draw:layer="layout" svg:x1="16.34cm" svg:y1="18.78cm" svg:x2="23.86cm" svg:y2="18.78cm">
          <text:p/>
        </draw:line>
        <draw:line draw:style-name="gr6" draw:text-style-name="P6" draw:layer="layout" svg:x1="23.76cm" svg:y1="18.78cm" svg:x2="23.76cm" svg:y2="21.218cm">
          <text:p/>
        </draw:line>
        <draw:line draw:style-name="gr7" draw:text-style-name="P6" draw:layer="layout" svg:x1="14.97cm" svg:y1="21.22cm" svg:x2="14.935cm" svg:y2="17.24cm">
          <text:p/>
        </draw:line>
        <draw:line draw:style-name="gr7" draw:text-style-name="P6" draw:layer="layout" svg:x1="25.13cm" svg:y1="21.22cm" svg:x2="25.13cm" svg:y2="17.275cm">
          <text:p/>
        </draw:line>
        <draw:line draw:style-name="gr8" draw:text-style-name="P6" draw:layer="layout" svg:x1="13.33cm" svg:y1="21.218cm" svg:x2="13.33cm" svg:y2="15.351cm">
          <text:p/>
        </draw:line>
        <draw:line draw:style-name="gr8" draw:text-style-name="P6" draw:layer="layout" svg:x1="26.77cm" svg:y1="21.22cm" svg:x2="26.77cm" svg:y2="15.37cm">
          <text:p/>
        </draw:line>
        <draw:line draw:style-name="gr9" draw:text-style-name="P6" draw:layer="layout" svg:x1="11.725cm" svg:y1="21.22cm" svg:x2="11.725cm" svg:y2="13.6cm">
          <text:p/>
        </draw:line>
        <draw:line draw:style-name="gr9" draw:text-style-name="P6" draw:layer="layout" svg:x1="28.375cm" svg:y1="21.22cm" svg:x2="28.375cm" svg:y2="13.6cm">
          <text:p/>
        </draw:line>
        <draw:line draw:style-name="gr10" draw:text-style-name="P6" draw:layer="layout" svg:x1="9.89cm" svg:y1="21.22cm" svg:x2="9.89cm" svg:y2="11.949cm">
          <text:p/>
        </draw:line>
        <draw:line draw:style-name="gr10" draw:text-style-name="P6" draw:layer="layout" svg:x1="30.08cm" svg:y1="21.22cm" svg:x2="30.08cm" svg:y2="11.93cm">
          <text:p/>
        </draw:line>
        <draw:line draw:style-name="gr11" draw:text-style-name="P6" draw:layer="layout" svg:x1="31.985cm" svg:y1="21.167cm" svg:x2="31.985cm" svg:y2="10.22cm">
          <text:p/>
        </draw:line>
        <draw:line draw:style-name="gr12" draw:text-style-name="P6" draw:layer="layout" svg:x1="33.585cm" svg:y1="21.171cm" svg:x2="33.585cm" svg:y2="8.42cm">
          <text:p/>
        </draw:line>
        <draw:line draw:style-name="gr13" draw:text-style-name="P6" draw:layer="layout" svg:x1="36.695cm" svg:y1="21.168cm" svg:x2="36.56cm" svg:y2="5.242cm">
          <text:p/>
        </draw:line>
        <draw:line draw:style-name="gr11" draw:text-style-name="P6" draw:layer="layout" svg:x1="8.585cm" svg:y1="21.219cm" svg:x2="8.585cm" svg:y2="10.322cm">
          <text:p/>
        </draw:line>
        <draw:line draw:style-name="gr12" draw:text-style-name="P6" draw:layer="layout" svg:x1="7.015cm" svg:y1="21.22cm" svg:x2="7.015cm" svg:y2="8.52cm">
          <text:p/>
        </draw:line>
        <draw:line draw:style-name="gr14" draw:text-style-name="P6" draw:layer="layout" svg:x1="5.445cm" svg:y1="21.22cm" svg:x2="5.445cm" svg:y2="6.915cm">
          <text:p/>
        </draw:line>
        <draw:line draw:style-name="gr15" draw:text-style-name="P6" draw:layer="layout" svg:x1="3.87cm" svg:y1="5.31cm" svg:x2="36.56cm" svg:y2="5.31cm">
          <text:p/>
        </draw:line>
        <draw:line draw:style-name="gr14" draw:text-style-name="P6" draw:layer="layout" svg:x1="5.445cm" svg:y1="6.98cm" svg:x2="35.29cm" svg:y2="6.98cm">
          <text:p/>
        </draw:line>
        <draw:line draw:style-name="gr12" draw:text-style-name="P6" draw:layer="layout" svg:x1="7.049cm" svg:y1="8.619cm" svg:x2="33.485cm" svg:y2="8.617cm">
          <text:p/>
        </draw:line>
        <draw:line draw:style-name="gr11" draw:text-style-name="P6" draw:layer="layout" svg:x1="8.518cm" svg:y1="10.325cm" svg:x2="31.911cm" svg:y2="10.325cm">
          <text:p/>
        </draw:line>
        <draw:line draw:style-name="gr10" draw:text-style-name="P6" draw:layer="layout" svg:x1="9.89cm" svg:y1="12.03cm" svg:x2="30.21cm" svg:y2="12.03cm">
          <text:p/>
        </draw:line>
        <draw:line draw:style-name="gr9" draw:text-style-name="P6" draw:layer="layout" svg:x1="11.795cm" svg:y1="13.7cm" svg:x2="28.305cm" svg:y2="13.7cm">
          <text:p/>
        </draw:line>
        <draw:line draw:style-name="gr8" draw:text-style-name="P6" draw:layer="layout" svg:x1="13.465cm" svg:y1="15.47cm" svg:x2="26.8cm" svg:y2="15.47cm">
          <text:p/>
        </draw:line>
        <draw:line draw:style-name="gr7" draw:text-style-name="P6" draw:layer="layout" svg:x1="14.97cm" svg:y1="17.34cm" svg:x2="25.13cm" svg:y2="17.34cm">
          <text:p/>
        </draw:line>
        <draw:line draw:style-name="gr15" draw:text-style-name="P6" draw:layer="layout" svg:x1="3.84cm" svg:y1="5.193cm" svg:x2="3.84cm" svg:y2="21.17cm">
          <text:p/>
        </draw:line>
        <draw:line draw:style-name="gr14" draw:text-style-name="P6" draw:layer="layout" svg:x1="35.29cm" svg:y1="21.168cm" svg:x2="35.29cm" svg:y2="6.893cm">
          <text:p/>
        </draw:line>
        <draw:frame draw:style-name="gr16" draw:text-style-name="P4" draw:layer="layout" svg:width="10.205cm" svg:height="1.038cm" svg:x="14.902cm" svg:y="17.488cm">
          <draw:text-box>
            <text:p><text:span text:style-name="T2">Py Cmnd Svcs --- PyCS-Core</text:span></text:p>
          </draw:text-box>
        </draw:frame>
        <draw:frame draw:style-name="gr17" draw:text-style-name="P4" draw:layer="layout" svg:width="6.433cm" svg:height="1.038cm" svg:x="16.792cm" svg:y="15.837cm">
          <draw:text-box>
            <text:p><text:span text:style-name="T2">PyCS-Foundation</text:span></text:p>
          </draw:text-box>
        </draw:frame>
        <draw:frame draw:style-name="gr18" draw:text-style-name="P4" draw:layer="layout" svg:width="10.795cm" svg:height="1.038cm" svg:x="14.97cm" svg:y="13.932cm">
          <draw:text-box>
            <text:p><text:span text:style-name="T2">PyCS-RO-RPyC <text:s/>(Invoker )</text:span></text:p>
          </draw:text-box>
        </draw:frame>
        <draw:frame draw:style-name="gr19" draw:text-style-name="P4" draw:layer="layout" svg:width="16.462cm" svg:height="1.038cm" svg:x="12.339cm" svg:y="10.66cm">
          <draw:text-box>
            <text:p><text:span text:style-name="T2">PyCS Loadable Modules and Targets (MaTOOF)</text:span></text:p>
          </draw:text-box>
        </draw:frame>
        <draw:frame draw:style-name="gr20" draw:text-style-name="P4" draw:layer="layout" svg:width="19.002cm" svg:height="1.038cm" svg:x="11.208cm" svg:y="8.852cm">
          <draw:text-box>
            <text:p><text:span text:style-name="T2">PyCS-RO OpenAPI Performer <text:s/>(Django DRF for CSXUs)</text:span></text:p>
          </draw:text-box>
        </draw:frame>
        <draw:frame draw:style-name="gr21" draw:text-style-name="P4" draw:layer="layout" svg:width="9.536cm" svg:height="1.038cm" svg:x="15.594cm" svg:y="7.35cm">
          <draw:text-box>
            <text:p><text:span text:style-name="T2">PyCS-RO OpenAPI Invoker</text:span></text:p>
          </draw:text-box>
        </draw:frame>
        <draw:frame draw:style-name="gr22" draw:text-style-name="P4" draw:layer="layout" svg:width="7.241cm" svg:height="1.038cm" svg:x="7.729cm" svg:y="5.445cm">
          <draw:text-box>
            <text:p><text:span text:style-name="T2">WebUI PyCS Player </text:span></text:p>
          </draw:text-box>
        </draw:frame>
        <draw:frame draw:style-name="gr23" draw:text-style-name="P4" draw:layer="layout" svg:width="6.996cm" svg:height="1.038cm" svg:x="25.509cm" svg:y="5.677cm">
          <draw:text-box>
            <text:p><text:span text:style-name="T2">Blee PyCS Player </text:span></text:p>
          </draw:text-box>
        </draw:frame>
        <draw:frame draw:style-name="gr18" draw:text-style-name="P4" draw:layer="layout" svg:width="10.795cm" svg:height="1.038cm" svg:x="14.97cm" svg:y="12.33cm">
          <draw:text-box>
            <text:p><text:span text:style-name="T2">PyCS <text:s/>Seeds and Plan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hsen Banan</meta:initial-creator>
    <meta:creation-date>2008-12-11T11:12:16</meta:creation-date>
    <dc:date>2026-06-17T13:21:49.886107653</dc:date>
    <meta:editing-cycles>65</meta:editing-cycles>
    <meta:editing-duration>PT9H51M37S</meta:editing-duration>
    <meta:print-date>2022-11-11T19:39:12.150258840</meta:print-date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